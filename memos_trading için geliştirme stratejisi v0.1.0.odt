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pitch="variable"/>
    <style:font-face style:name="Google Sans" svg:font-family="'Google Sans', Arial, sans-serif"/>
    <style:font-face style:name="Laksaman" svg:font-family="Laksa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sans-serif"/>
    <style:font-face style:name="monospace" svg:font-family="monospace"/>
  </office:font-face-decls>
  <office:automatic-styles>
    <style:style style:name="P1" style:family="paragraph" style:parent-style-name="Horizontal_20_Line">
      <style:paragraph-properties fo:text-align="justify" style:justify-single-word="false"/>
      <style:text-properties style:font-name="Laksaman"/>
    </style:style>
    <style:style style:name="P2" style:family="paragraph" style:parent-style-name="Standard">
      <style:paragraph-properties fo:margin-left="0cm" fo:margin-right="0cm" fo:margin-top="0cm" fo:margin-bottom="0.635cm" style:contextual-spacing="false" style:line-height-at-least="0.741cm" fo:text-align="justify" style:justify-single-word="false" fo:orphans="2" fo:widows="2" fo:text-indent="0cm" style:auto-text-indent="false"/>
      <style:text-properties fo:font-variant="normal" fo:text-transform="none" fo:color="#0a0a0a" loext:opacity="100%" style:font-name="Laksaman" fo:font-size="12pt" fo:letter-spacing="normal" fo:font-style="normal" fo:font-weight="normal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.318cm" style:contextual-spacing="false" style:line-height-at-least="0.635cm" fo:text-align="justify" style:justify-single-word="false" fo:orphans="2" fo:widows="2" fo:text-indent="0cm" style:auto-text-indent="false"/>
      <style:text-properties fo:font-variant="normal" fo:text-transform="none" fo:color="#0a0a0a" loext:opacity="100%" style:font-name="Laksaman" fo:font-size="12pt" fo:letter-spacing="normal" fo:font-style="normal" fo:font-weight="normal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0a0a0a" loext:opacity="100%" style:font-name="Laksaman" fo:font-size="12pt" fo:letter-spacing="normal" fo:font-style="normal" fo:font-weight="normal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.318cm" style:contextual-spacing="false" style:line-height-at-least="0.635cm" fo:text-align="justify" style:justify-single-word="false" fo:orphans="2" fo:widows="2" fo:text-indent="0cm" style:auto-text-indent="false"/>
      <style:text-properties fo:font-variant="normal" fo:text-transform="none" fo:color="#0a0a0a" loext:opacity="100%" style:font-name="Laksaman" fo:font-size="12pt" fo:letter-spacing="normal" fo:font-style="normal" fo:font-weight="normal"/>
    </style:style>
    <style:style style:name="P6" style:family="paragraph" style:parent-style-name="Standard">
      <style:paragraph-properties fo:margin-left="0cm" fo:margin-right="0cm" fo:margin-top="0cm" fo:margin-bottom="0.635cm" style:contextual-spacing="false" style:line-height-at-least="0.741cm" fo:text-align="justify" style:justify-single-word="false" fo:orphans="2" fo:widows="2" fo:text-indent="0cm" style:auto-text-indent="false"/>
      <style:text-properties fo:font-variant="normal" fo:text-transform="none" fo:color="#0a0a0a" loext:opacity="100%" style:font-name="Laksaman" fo:font-size="15pt" fo:letter-spacing="normal" fo:font-style="normal" fo:font-weight="normal"/>
    </style:style>
    <style:style style:name="P7" style:family="paragraph" style:parent-style-name="Standard">
      <style:paragraph-properties fo:margin-left="0cm" fo:margin-right="0cm" fo:margin-top="0cm" fo:margin-bottom="0.635cm" style:contextual-spacing="false" style:line-height-at-least="0.741cm" fo:text-align="justify" style:justify-single-word="false" fo:orphans="2" fo:widows="2" fo:text-indent="0cm" style:auto-text-indent="false"/>
      <style:text-properties fo:font-variant="normal" fo:text-transform="none" fo:color="#0a0a0a" loext:opacity="100%" style:font-name="Laksaman" fo:font-size="15pt" fo:letter-spacing="normal" fo:font-style="normal" fo:font-weight="normal" officeooo:paragraph-rsid="00122c1f"/>
    </style:style>
    <style:style style:name="P8" style:family="paragraph" style:parent-style-name="Standard">
      <style:paragraph-properties fo:margin-left="0cm" fo:margin-right="0cm" fo:margin-top="0cm" fo:margin-bottom="0.635cm" style:contextual-spacing="false" style:line-height-at-least="0.741cm" fo:text-align="justify" style:justify-single-word="false" fo:orphans="2" fo:widows="2" fo:text-indent="0cm" style:auto-text-indent="false"/>
      <style:text-properties fo:font-variant="normal" fo:text-transform="none" fo:color="#0a0a0a" loext:opacity="100%" style:font-name="Laksaman" fo:font-size="15pt" fo:letter-spacing="normal" fo:font-style="normal" fo:font-weight="bold" style:font-weight-asian="bold" style:font-weight-complex="bold"/>
    </style:style>
    <style:style style:name="P9" style:family="paragraph" style:parent-style-name="Standard">
      <style:paragraph-properties fo:margin-left="0cm" fo:margin-right="0cm" fo:margin-top="0cm" fo:margin-bottom="0.635cm" style:contextual-spacing="false" style:line-height-at-least="0.741cm" fo:text-align="justify" style:justify-single-word="false" fo:orphans="2" fo:widows="2" fo:text-indent="0cm" style:auto-text-indent="false"/>
      <style:text-properties fo:font-variant="normal" fo:text-transform="none" fo:color="#0a0a0a" loext:opacity="100%" style:font-name="Laksaman" fo:font-size="15pt" fo:letter-spacing="normal" fo:font-style="normal" fo:font-weight="bold" officeooo:paragraph-rsid="00122c1f" style:font-weight-asian="bold" style:font-weight-complex="bold"/>
    </style:style>
    <style:style style:name="P10" style:family="paragraph" style:parent-style-name="Standard">
      <style:paragraph-properties fo:margin-left="0cm" fo:margin-right="0cm" fo:margin-top="0cm" fo:margin-bottom="0.635cm" style:contextual-spacing="false" style:line-height-at-least="0.741cm" fo:text-align="justify" style:justify-single-word="false" fo:orphans="2" fo:widows="2" fo:text-indent="0cm" style:auto-text-indent="false"/>
      <style:text-properties fo:font-variant="normal" fo:text-transform="none" fo:color="#0a0a0a" loext:opacity="100%" style:font-name="Laksaman" fo:font-size="15pt" fo:letter-spacing="normal" fo:font-style="normal" fo:font-weight="bold" officeooo:paragraph-rsid="0016956e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a0a0a" loext:opacity="100%" style:font-name="Laksaman" fo:font-size="14pt" fo:letter-spacing="normal" fo:font-style="normal" fo:font-weight="bold" officeooo:rsid="000bc003" officeooo:paragraph-rsid="000bc003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margin-top="0cm" fo:margin-bottom="0.318cm" style:contextual-spacing="false" style:line-height-at-least="0.635cm" fo:text-align="justify" style:justify-single-word="false" fo:orphans="2" fo:widows="2" fo:text-indent="0cm" style:auto-text-indent="false"/>
    </style:style>
    <style:style style:name="P13" style:family="paragraph" style:parent-style-name="Standard">
      <style:paragraph-properties fo:margin-left="0cm" fo:margin-right="0cm" fo:margin-top="0cm" fo:margin-bottom="0.318cm" style:contextual-spacing="false" style:line-height-at-least="0.635cm" fo:text-align="justify" style:justify-single-word="false" fo:orphans="2" fo:widows="2" fo:text-indent="0cm" style:auto-text-indent="false"/>
      <style:text-properties officeooo:paragraph-rsid="00139a6c"/>
    </style:style>
    <style:style style:name="P14" style:family="paragraph" style:parent-style-name="Text_20_body">
      <style:paragraph-properties fo:margin-left="0cm" fo:margin-right="0cm" fo:margin-top="0cm" fo:margin-bottom="0.635cm" style:contextual-spacing="false" style:line-height-at-least="0.741cm" fo:text-align="justify" style:justify-single-word="false" fo:orphans="2" fo:widows="2" fo:text-indent="0cm" style:auto-text-indent="false"/>
      <style:text-properties fo:font-variant="normal" fo:text-transform="none" fo:color="#0a0a0a" loext:opacity="100%" style:font-name="Laksaman" fo:font-size="12pt" fo:letter-spacing="normal" fo:font-style="normal" fo:font-weight="normal" style:font-size-asian="12pt" style:font-size-complex="12pt"/>
    </style:style>
    <style:style style:name="P15" style:family="paragraph" style:parent-style-name="Text_20_body">
      <style:paragraph-properties fo:margin-left="0cm" fo:margin-right="0cm" fo:margin-top="0cm" fo:margin-bottom="0.318cm" style:contextual-spacing="false" style:line-height-at-least="0.635cm" fo:text-align="justify" style:justify-single-word="false" fo:orphans="2" fo:widows="2" fo:text-indent="0cm" style:auto-text-indent="false"/>
      <style:text-properties fo:font-variant="normal" fo:text-transform="none" fo:color="#0a0a0a" loext:opacity="100%" style:font-name="Laksaman" fo:font-size="12pt" fo:letter-spacing="normal" fo:font-style="normal" fo:font-weight="normal" style:font-size-asian="12pt" style:font-size-complex="12pt"/>
    </style:style>
    <style:style style:name="P16" style:family="paragraph" style:parent-style-name="Text_20_body">
      <style:paragraph-properties fo:margin-left="0cm" fo:margin-right="0cm" fo:margin-top="0cm" fo:margin-bottom="0.318cm" style:contextual-spacing="false" style:line-height-at-least="0.635cm" fo:text-align="justify" style:justify-single-word="false" fo:orphans="2" fo:widows="2" fo:text-indent="0cm" style:auto-text-indent="false"/>
      <style:text-properties fo:font-variant="normal" fo:text-transform="none" fo:color="#0a0a0a" loext:opacity="100%" style:font-name="Laksaman" fo:font-size="12pt" fo:letter-spacing="normal" fo:font-style="normal" fo:font-weight="normal"/>
    </style:style>
    <style:style style:name="P17" style:family="paragraph" style:parent-style-name="Text_20_body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a0a0a" loext:opacity="100%" style:font-name="Laksaman" fo:font-size="12pt" fo:letter-spacing="normal" fo:font-style="normal" fo:font-weight="normal"/>
    </style:style>
    <style:style style:name="P18" style:family="paragraph" style:parent-style-name="Text_20_body" style:list-style-name="L24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a0a0a" loext:opacity="100%" style:font-name="Laksaman" fo:font-size="12pt" fo:letter-spacing="normal" fo:font-style="normal" fo:font-weight="normal"/>
    </style:style>
    <style:style style:name="P19" style:family="paragraph" style:parent-style-name="Text_20_body" style:list-style-name="L24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a0a0a" loext:opacity="100%" style:font-name="Laksaman" fo:font-size="12pt" fo:letter-spacing="normal" fo:font-style="normal" fo:font-weight="normal" officeooo:paragraph-rsid="00122c1f"/>
    </style:style>
    <style:style style:name="P20" style:family="paragraph" style:parent-style-name="Text_20_body" style:list-style-name="L30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a0a0a" loext:opacity="100%" style:font-name="Laksaman" fo:font-size="12pt" fo:letter-spacing="normal" fo:font-style="normal" fo:font-weight="normal"/>
    </style:style>
    <style:style style:name="P21" style:family="paragraph" style:parent-style-name="Text_20_body" style:list-style-name="L31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a0a0a" loext:opacity="100%" style:font-name="Laksaman" fo:font-size="12pt" fo:letter-spacing="normal" fo:font-style="normal" fo:font-weight="normal"/>
    </style:style>
    <style:style style:name="P22" style:family="paragraph" style:parent-style-name="Text_20_body">
      <style:paragraph-properties fo:margin-left="0cm" fo:margin-right="0cm" fo:margin-top="0cm" fo:margin-bottom="0.635cm" style:contextual-spacing="false" style:line-height-at-least="0.741cm" fo:text-align="justify" style:justify-single-word="false" fo:orphans="2" fo:widows="2" fo:text-indent="0cm" style:auto-text-indent="false"/>
      <style:text-properties fo:font-variant="normal" fo:text-transform="none" fo:color="#0a0a0a" loext:opacity="100%" style:font-name="Laksaman" fo:font-size="12pt" fo:letter-spacing="normal" fo:font-style="normal" fo:font-weight="bold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left="0cm" fo:margin-right="0cm" fo:margin-top="0cm" fo:margin-bottom="0.635cm" style:contextual-spacing="false" style:line-height-at-least="0.741cm" fo:text-align="justify" style:justify-single-word="false" fo:orphans="2" fo:widows="2" fo:text-indent="0cm" style:auto-text-indent="false"/>
      <style:text-properties fo:font-variant="normal" fo:text-transform="none" fo:color="#0a0a0a" loext:opacity="100%" style:font-name="Laksaman" fo:font-size="15pt" fo:letter-spacing="normal" fo:font-style="normal" fo:font-weight="normal"/>
    </style:style>
    <style:style style:name="P24" style:family="paragraph" style:parent-style-name="Text_20_body">
      <style:paragraph-properties fo:margin-left="0cm" fo:margin-right="0cm" fo:margin-top="0cm" fo:margin-bottom="0.635cm" style:contextual-spacing="false" style:line-height-at-least="0.741cm" fo:text-align="justify" style:justify-single-word="false" fo:orphans="2" fo:widows="2" fo:text-indent="0cm" style:auto-text-indent="false"/>
      <style:text-properties fo:font-variant="normal" fo:text-transform="none" fo:color="#0a0a0a" loext:opacity="100%" style:font-name="Laksaman" fo:font-size="15pt" fo:letter-spacing="normal" fo:font-style="normal" fo:font-weight="normal" officeooo:paragraph-rsid="0010c429"/>
    </style:style>
    <style:style style:name="P25" style:family="paragraph" style:parent-style-name="Text_20_body">
      <style:paragraph-properties fo:margin-left="0cm" fo:margin-right="0cm" fo:margin-top="0cm" fo:margin-bottom="0.635cm" style:contextual-spacing="false" style:line-height-at-least="0.741cm" fo:text-align="justify" style:justify-single-word="false" fo:orphans="2" fo:widows="2" fo:text-indent="0cm" style:auto-text-indent="false"/>
      <style:text-properties fo:font-variant="normal" fo:text-transform="none" fo:color="#0a0a0a" loext:opacity="100%" style:font-name="Laksaman" fo:font-size="15pt" fo:letter-spacing="normal" fo:font-style="normal" fo:font-weight="bold" style:font-weight-asian="bold" style:font-weight-complex="bold"/>
    </style:style>
    <style:style style:name="P26" style:family="paragraph" style:parent-style-name="Text_20_body">
      <style:paragraph-properties fo:margin-left="0cm" fo:margin-right="0cm" fo:margin-top="0cm" fo:margin-bottom="0.635cm" style:contextual-spacing="false" style:line-height-at-least="0.741cm" fo:text-align="justify" style:justify-single-word="false" fo:orphans="2" fo:widows="2" fo:text-indent="0cm" style:auto-text-indent="false"/>
      <style:text-properties fo:font-variant="normal" fo:text-transform="none" fo:color="#0a0a0a" loext:opacity="100%" style:font-name="Laksaman" fo:font-size="15pt" fo:letter-spacing="normal" fo:font-style="normal" fo:font-weight="bold" officeooo:paragraph-rsid="0010c429" style:font-weight-asian="bold" style:font-weight-complex="bold"/>
    </style:style>
    <style:style style:name="P27" style:family="paragraph" style:parent-style-name="Text_20_body">
      <style:paragraph-properties fo:margin-left="0cm" fo:margin-right="0cm" fo:margin-top="0cm" fo:margin-bottom="0.635cm" style:contextual-spacing="false" style:line-height-at-least="0.741cm" fo:text-align="justify" style:justify-single-word="false" fo:orphans="2" fo:widows="2" fo:text-indent="0cm" style:auto-text-indent="false"/>
      <style:text-properties fo:font-variant="normal" fo:text-transform="none" fo:color="#0a0a0a" loext:opacity="100%" style:font-name="Laksaman" fo:letter-spacing="normal"/>
    </style:style>
    <style:style style:name="P28" style:family="paragraph" style:parent-style-name="Text_20_body" style:list-style-name="L53">
      <style:paragraph-properties fo:margin-top="0cm" fo:margin-bottom="0cm" style:contextual-spacing="false" fo:line-height="145%" fo:text-align="justify" style:justify-single-word="false" fo:orphans="2" fo:widows="2" fo:padding="0cm" fo:border="none"/>
      <style:text-properties fo:font-variant="normal" fo:text-transform="none" fo:color="#0a0a0a" loext:opacity="100%" style:font-name="Laksaman" fo:letter-spacing="normal"/>
    </style:style>
    <style:style style:name="P29" style:family="paragraph" style:parent-style-name="Text_20_body" style:list-style-name="L54">
      <style:paragraph-properties fo:margin-top="0cm" fo:margin-bottom="0cm" style:contextual-spacing="false" fo:line-height="145%" fo:text-align="justify" style:justify-single-word="false" fo:orphans="2" fo:widows="2" fo:padding="0cm" fo:border="none"/>
      <style:text-properties fo:font-variant="normal" fo:text-transform="none" fo:color="#0a0a0a" loext:opacity="100%" style:font-name="Laksaman" fo:letter-spacing="normal"/>
    </style:style>
    <style:style style:name="P30" style:family="paragraph" style:parent-style-name="Text_20_body" style:list-style-name="L55">
      <style:paragraph-properties fo:margin-top="0cm" fo:margin-bottom="0cm" style:contextual-spacing="false" fo:line-height="145%" fo:text-align="justify" style:justify-single-word="false" fo:orphans="2" fo:widows="2" fo:padding="0cm" fo:border="none"/>
      <style:text-properties fo:font-variant="normal" fo:text-transform="none" fo:color="#0a0a0a" loext:opacity="100%" style:font-name="Laksaman" fo:letter-spacing="normal"/>
    </style:style>
    <style:style style:name="P31" style:family="paragraph" style:parent-style-name="Text_20_body" style:list-style-name="L56">
      <style:paragraph-properties fo:margin-top="0cm" fo:margin-bottom="0cm" style:contextual-spacing="false" fo:line-height="145%" fo:text-align="justify" style:justify-single-word="false" fo:orphans="2" fo:widows="2" fo:padding="0cm" fo:border="none"/>
      <style:text-properties fo:font-variant="normal" fo:text-transform="none" fo:color="#0a0a0a" loext:opacity="100%" style:font-name="Laksaman" fo:letter-spacing="normal"/>
    </style:style>
    <style:style style:name="P32" style:family="paragraph" style:parent-style-name="Text_20_body" style:list-style-name="L57">
      <style:paragraph-properties fo:margin-top="0cm" fo:margin-bottom="0cm" style:contextual-spacing="false" fo:line-height="145%" fo:text-align="justify" style:justify-single-word="false" fo:orphans="2" fo:widows="2" fo:padding="0cm" fo:border="none"/>
      <style:text-properties fo:font-variant="normal" fo:text-transform="none" fo:color="#0a0a0a" loext:opacity="100%" style:font-name="Laksaman" fo:letter-spacing="normal"/>
    </style:style>
    <style:style style:name="P33" style:family="paragraph" style:parent-style-name="Text_20_body">
      <style:paragraph-properties fo:margin-left="0cm" fo:margin-right="0cm" fo:margin-top="0cm" fo:margin-bottom="0.635cm" style:contextual-spacing="false" style:line-height-at-least="0.741cm" fo:text-align="justify" style:justify-single-word="false" fo:orphans="2" fo:widows="2" fo:text-indent="0cm" style:auto-text-indent="false"/>
      <style:text-properties fo:font-variant="normal" fo:text-transform="none" fo:color="#0a0a0a" loext:opacity="100%" style:font-name="Laksaman" fo:letter-spacing="normal" fo:font-weight="bold" style:font-weight-asian="bold" style:font-weight-complex="bold"/>
    </style:style>
    <style:style style:name="P34" style:family="paragraph" style:parent-style-name="Text_20_body" style:list-style-name="L12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officeooo:paragraph-rsid="000f261e"/>
    </style:style>
    <style:style style:name="P35" style:family="paragraph" style:parent-style-name="Text_20_body" style:list-style-name="L13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officeooo:paragraph-rsid="0010c429"/>
    </style:style>
    <style:style style:name="P36" style:family="paragraph" style:parent-style-name="Text_20_body" style:list-style-name="L14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</style:style>
    <style:style style:name="P37" style:family="paragraph" style:parent-style-name="Text_20_body" style:list-style-name="L14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officeooo:paragraph-rsid="0010c429"/>
    </style:style>
    <style:style style:name="P38" style:family="paragraph" style:parent-style-name="Text_20_body" style:list-style-name="L15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officeooo:paragraph-rsid="0010c429"/>
    </style:style>
    <style:style style:name="P39" style:family="paragraph" style:parent-style-name="Text_20_body" style:list-style-name="L16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officeooo:paragraph-rsid="0010c429"/>
    </style:style>
    <style:style style:name="P40" style:family="paragraph" style:parent-style-name="Text_20_body" style:list-style-name="L17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officeooo:paragraph-rsid="0010c429"/>
    </style:style>
    <style:style style:name="P41" style:family="paragraph" style:parent-style-name="Text_20_body">
      <style:paragraph-properties fo:margin-left="0cm" fo:margin-right="0cm" fo:margin-top="0cm" fo:margin-bottom="0.318cm" style:contextual-spacing="false" style:line-height-at-least="0.635cm" fo:text-align="justify" style:justify-single-word="false" fo:orphans="2" fo:widows="2" fo:text-indent="0cm" style:auto-text-indent="false"/>
    </style:style>
    <style:style style:name="P42" style:family="paragraph" style:parent-style-name="Text_20_body" style:list-style-name="L18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officeooo:paragraph-rsid="0010c429"/>
    </style:style>
    <style:style style:name="P43" style:family="paragraph" style:parent-style-name="Text_20_body" style:list-style-name="L19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officeooo:paragraph-rsid="0010c429"/>
    </style:style>
    <style:style style:name="P44" style:family="paragraph" style:parent-style-name="Text_20_body" style:list-style-name="L20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officeooo:paragraph-rsid="0010c429"/>
    </style:style>
    <style:style style:name="P45" style:family="paragraph" style:parent-style-name="Text_20_body" style:list-style-name="L21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officeooo:paragraph-rsid="0010c429"/>
    </style:style>
    <style:style style:name="P46" style:family="paragraph" style:parent-style-name="Text_20_body" style:list-style-name="L22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</style:style>
    <style:style style:name="P47" style:family="paragraph" style:parent-style-name="Text_20_body" style:list-style-name="L23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officeooo:paragraph-rsid="00122c1f"/>
    </style:style>
    <style:style style:name="P48" style:family="paragraph" style:parent-style-name="Text_20_body" style:list-style-name="L24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officeooo:paragraph-rsid="00122c1f"/>
    </style:style>
    <style:style style:name="P49" style:family="paragraph" style:parent-style-name="Text_20_body" style:list-style-name="L25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officeooo:paragraph-rsid="00122c1f"/>
    </style:style>
    <style:style style:name="P50" style:family="paragraph" style:parent-style-name="Text_20_body" style:list-style-name="L26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officeooo:paragraph-rsid="00122c1f"/>
    </style:style>
    <style:style style:name="P51" style:family="paragraph" style:parent-style-name="Text_20_body" style:list-style-name="L27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officeooo:paragraph-rsid="00139140"/>
    </style:style>
    <style:style style:name="P52" style:family="paragraph" style:parent-style-name="Text_20_body" style:list-style-name="L28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officeooo:paragraph-rsid="00139a6c"/>
    </style:style>
    <style:style style:name="P53" style:family="paragraph" style:parent-style-name="Text_20_body" style:list-style-name="L29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officeooo:paragraph-rsid="00139a6c"/>
    </style:style>
    <style:style style:name="P54" style:family="paragraph" style:parent-style-name="Text_20_body" style:list-style-name="L30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</style:style>
    <style:style style:name="P55" style:family="paragraph" style:parent-style-name="Text_20_body" style:list-style-name="L31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</style:style>
    <style:style style:name="P56" style:family="paragraph" style:parent-style-name="Text_20_body" style:list-style-name="L32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officeooo:paragraph-rsid="0014cbb1"/>
    </style:style>
    <style:style style:name="P57" style:family="paragraph" style:parent-style-name="Text_20_body" style:list-style-name="L33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officeooo:paragraph-rsid="0014cbb1"/>
    </style:style>
    <style:style style:name="P58" style:family="paragraph" style:parent-style-name="Text_20_body" style:list-style-name="L34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officeooo:paragraph-rsid="0014cbb1"/>
    </style:style>
    <style:style style:name="P59" style:family="paragraph" style:parent-style-name="Text_20_body" style:list-style-name="L35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officeooo:paragraph-rsid="0014cbb1"/>
    </style:style>
    <style:style style:name="P60" style:family="paragraph" style:parent-style-name="Text_20_body" style:list-style-name="L36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officeooo:paragraph-rsid="0014cbb1"/>
    </style:style>
    <style:style style:name="P61" style:family="paragraph" style:parent-style-name="Text_20_body" style:list-style-name="L37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officeooo:paragraph-rsid="0014cbb1"/>
    </style:style>
    <style:style style:name="P62" style:family="paragraph" style:parent-style-name="Text_20_body" style:list-style-name="L38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officeooo:paragraph-rsid="0014cbb1"/>
    </style:style>
    <style:style style:name="P63" style:family="paragraph" style:parent-style-name="Text_20_body" style:list-style-name="L39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officeooo:paragraph-rsid="00167e5b"/>
    </style:style>
    <style:style style:name="P64" style:family="paragraph" style:parent-style-name="Text_20_body" style:list-style-name="L40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officeooo:paragraph-rsid="0016956e"/>
    </style:style>
    <style:style style:name="P65" style:family="paragraph" style:parent-style-name="Text_20_body" style:list-style-name="L41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</style:style>
    <style:style style:name="P66" style:family="paragraph" style:parent-style-name="Text_20_body" style:list-style-name="L43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officeooo:paragraph-rsid="0016956e"/>
    </style:style>
    <style:style style:name="P67" style:family="paragraph" style:parent-style-name="Text_20_body" style:list-style-name="L44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officeooo:paragraph-rsid="0016956e"/>
    </style:style>
    <style:style style:name="P68" style:family="paragraph" style:parent-style-name="Text_20_body" style:list-style-name="L45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officeooo:paragraph-rsid="0016956e"/>
    </style:style>
    <style:style style:name="P69" style:family="paragraph" style:parent-style-name="Text_20_body" style:list-style-name="L46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</style:style>
    <style:style style:name="P70" style:family="paragraph" style:parent-style-name="Text_20_body" style:list-style-name="L46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officeooo:paragraph-rsid="0016956e"/>
    </style:style>
    <style:style style:name="P71" style:family="paragraph" style:parent-style-name="Text_20_body" style:list-style-name="L47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officeooo:paragraph-rsid="0016956e"/>
    </style:style>
    <style:style style:name="P72" style:family="paragraph" style:parent-style-name="Text_20_body" style:list-style-name="L48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officeooo:paragraph-rsid="0016956e"/>
    </style:style>
    <style:style style:name="P73" style:family="paragraph" style:parent-style-name="Text_20_body" style:list-style-name="L49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officeooo:paragraph-rsid="0016956e"/>
    </style:style>
    <style:style style:name="P74" style:family="paragraph" style:parent-style-name="Text_20_body" style:list-style-name="L50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officeooo:paragraph-rsid="0016956e"/>
    </style:style>
    <style:style style:name="P75" style:family="paragraph" style:parent-style-name="Text_20_body" style:list-style-name="L51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officeooo:paragraph-rsid="0016956e"/>
    </style:style>
    <style:style style:name="P76" style:family="paragraph" style:parent-style-name="Text_20_body" style:list-style-name="L52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officeooo:paragraph-rsid="0016956e"/>
    </style:style>
    <style:style style:name="P77" style:family="paragraph" style:parent-style-name="Text_20_body" style:list-style-name="L53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officeooo:paragraph-rsid="0016956e"/>
    </style:style>
    <style:style style:name="P78" style:family="paragraph" style:parent-style-name="Text_20_body" style:list-style-name="L54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officeooo:paragraph-rsid="0016956e"/>
    </style:style>
    <style:style style:name="P79" style:family="paragraph" style:parent-style-name="Text_20_body" style:list-style-name="L55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officeooo:paragraph-rsid="0016956e"/>
    </style:style>
    <style:style style:name="P80" style:family="paragraph" style:parent-style-name="Text_20_body" style:list-style-name="L56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officeooo:paragraph-rsid="0016956e"/>
    </style:style>
    <style:style style:name="P81" style:family="paragraph" style:parent-style-name="Text_20_body" style:list-style-name="L57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officeooo:paragraph-rsid="0016956e"/>
    </style:style>
    <style:style style:name="P82" style:family="paragraph" style:parent-style-name="Text_20_body">
      <style:paragraph-properties fo:margin-left="0cm" fo:margin-right="0cm" fo:margin-top="0cm" fo:margin-bottom="0.318cm" style:contextual-spacing="false" style:line-height-at-least="0.635cm" fo:text-align="justify" style:justify-single-word="false" fo:orphans="2" fo:widows="2" fo:text-indent="0cm" style:auto-text-indent="false"/>
      <style:text-properties officeooo:paragraph-rsid="0010c429"/>
    </style:style>
    <style:style style:name="P83" style:family="paragraph" style:parent-style-name="Text_20_body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officeooo:paragraph-rsid="00139140"/>
    </style:style>
    <style:style style:name="P84" style:family="paragraph" style:parent-style-name="Text_20_body">
      <style:paragraph-properties fo:margin-left="0cm" fo:margin-right="0cm" fo:margin-top="0cm" fo:margin-bottom="0.318cm" style:contextual-spacing="false" style:line-height-at-least="0.635cm" fo:text-align="justify" style:justify-single-word="false" fo:orphans="2" fo:widows="2" fo:text-indent="0cm" style:auto-text-indent="false"/>
      <style:text-properties officeooo:paragraph-rsid="0016956e"/>
    </style:style>
    <style:style style:name="P85" style:family="paragraph" style:parent-style-name="Text_20_body" style:list-style-name="L12">
      <style:paragraph-properties fo:margin-left="0cm" fo:margin-right="0cm" fo:margin-top="0cm" fo:margin-bottom="0cm" style:contextual-spacing="false" style:line-height-at-least="0.582cm" fo:text-align="justify" style:justify-single-word="false" fo:orphans="2" fo:widows="2" fo:text-indent="0cm" style:auto-text-indent="false" fo:padding="0cm" fo:border="none" style:writing-mode="lr-tb"/>
    </style:style>
    <style:style style:name="P86" style:family="paragraph" style:parent-style-name="Text_20_body" style:list-style-name="L12">
      <style:paragraph-properties fo:margin-left="0cm" fo:margin-right="0cm" fo:margin-top="0cm" fo:margin-bottom="0cm" style:contextual-spacing="false" style:line-height-at-least="0.582cm" fo:text-align="justify" style:justify-single-word="false" fo:orphans="2" fo:widows="2" fo:text-indent="0cm" style:auto-text-indent="false" fo:padding="0cm" fo:border="none" style:writing-mode="lr-tb"/>
      <style:text-properties officeooo:paragraph-rsid="000f261e"/>
    </style:style>
    <style:style style:name="P87" style:family="paragraph" style:parent-style-name="Text_20_body" style:list-style-name="L13">
      <style:paragraph-properties fo:margin-left="0cm" fo:margin-right="0cm" fo:margin-top="0cm" fo:margin-bottom="0cm" style:contextual-spacing="false" style:line-height-at-least="0.582cm" fo:text-align="justify" style:justify-single-word="false" fo:orphans="2" fo:widows="2" fo:text-indent="0cm" style:auto-text-indent="false" fo:padding="0cm" fo:border="none" style:writing-mode="lr-tb"/>
    </style:style>
    <style:style style:name="P88" style:family="paragraph" style:parent-style-name="Text_20_body" style:list-style-name="L13">
      <style:paragraph-properties fo:margin-left="0cm" fo:margin-right="0cm" fo:margin-top="0cm" fo:margin-bottom="0cm" style:contextual-spacing="false" style:line-height-at-least="0.582cm" fo:text-align="justify" style:justify-single-word="false" fo:orphans="2" fo:widows="2" fo:text-indent="0cm" style:auto-text-indent="false" fo:padding="0cm" fo:border="none" style:writing-mode="lr-tb"/>
      <style:text-properties officeooo:paragraph-rsid="0010c429"/>
    </style:style>
    <style:style style:name="P89" style:family="paragraph" style:parent-style-name="Text_20_body" style:list-style-name="L15">
      <style:paragraph-properties fo:margin-left="0cm" fo:margin-right="0cm" fo:margin-top="0cm" fo:margin-bottom="0cm" style:contextual-spacing="false" style:line-height-at-least="0.582cm" fo:text-align="justify" style:justify-single-word="false" fo:orphans="2" fo:widows="2" fo:text-indent="0cm" style:auto-text-indent="false" fo:padding="0cm" fo:border="none" style:writing-mode="lr-tb"/>
      <style:text-properties officeooo:paragraph-rsid="0010c429"/>
    </style:style>
    <style:style style:name="P90" style:family="paragraph" style:parent-style-name="Text_20_body" style:list-style-name="L17">
      <style:paragraph-properties fo:margin-left="0cm" fo:margin-right="0cm" fo:margin-top="0cm" fo:margin-bottom="0cm" style:contextual-spacing="false" style:line-height-at-least="0.582cm" fo:text-align="justify" style:justify-single-word="false" fo:orphans="2" fo:widows="2" fo:text-indent="0cm" style:auto-text-indent="false" fo:padding="0cm" fo:border="none" style:writing-mode="lr-tb"/>
      <style:text-properties officeooo:paragraph-rsid="0010c429"/>
    </style:style>
    <style:style style:name="P91" style:family="paragraph" style:parent-style-name="Text_20_body" style:list-style-name="L18">
      <style:paragraph-properties fo:margin-left="0cm" fo:margin-right="0cm" fo:margin-top="0cm" fo:margin-bottom="0cm" style:contextual-spacing="false" style:line-height-at-least="0.582cm" fo:text-align="justify" style:justify-single-word="false" fo:orphans="2" fo:widows="2" fo:text-indent="0cm" style:auto-text-indent="false" fo:padding="0cm" fo:border="none" style:writing-mode="lr-tb"/>
      <style:text-properties officeooo:paragraph-rsid="0010c429"/>
    </style:style>
    <style:style style:name="P92" style:family="paragraph" style:parent-style-name="Text_20_body" style:list-style-name="L19">
      <style:paragraph-properties fo:margin-left="0cm" fo:margin-right="0cm" fo:margin-top="0cm" fo:margin-bottom="0cm" style:contextual-spacing="false" style:line-height-at-least="0.582cm" fo:text-align="justify" style:justify-single-word="false" fo:orphans="2" fo:widows="2" fo:text-indent="0cm" style:auto-text-indent="false" fo:padding="0cm" fo:border="none" style:writing-mode="lr-tb"/>
      <style:text-properties officeooo:paragraph-rsid="0010c429"/>
    </style:style>
    <style:style style:name="P93" style:family="paragraph" style:parent-style-name="Text_20_body" style:list-style-name="L22">
      <style:paragraph-properties fo:margin-left="0cm" fo:margin-right="0cm" fo:margin-top="0cm" fo:margin-bottom="0cm" style:contextual-spacing="false" style:line-height-at-least="0.582cm" fo:text-align="justify" style:justify-single-word="false" fo:orphans="2" fo:widows="2" fo:text-indent="0cm" style:auto-text-indent="false" fo:padding="0cm" fo:border="none" style:writing-mode="lr-tb"/>
    </style:style>
    <style:style style:name="P94" style:family="paragraph" style:parent-style-name="Text_20_body" style:list-style-name="L33">
      <style:paragraph-properties fo:margin-left="0cm" fo:margin-right="0cm" fo:margin-top="0cm" fo:margin-bottom="0cm" style:contextual-spacing="false" style:line-height-at-least="0.582cm" fo:text-align="justify" style:justify-single-word="false" fo:orphans="2" fo:widows="2" fo:text-indent="0cm" style:auto-text-indent="false" fo:padding="0cm" fo:border="none" style:writing-mode="lr-tb"/>
      <style:text-properties officeooo:paragraph-rsid="0014cbb1"/>
    </style:style>
    <style:style style:name="P95" style:family="paragraph" style:parent-style-name="Text_20_body" style:list-style-name="L37">
      <style:paragraph-properties fo:margin-left="0cm" fo:margin-right="0cm" fo:margin-top="0cm" fo:margin-bottom="0cm" style:contextual-spacing="false" style:line-height-at-least="0.582cm" fo:text-align="justify" style:justify-single-word="false" fo:orphans="2" fo:widows="2" fo:text-indent="0cm" style:auto-text-indent="false" fo:padding="0cm" fo:border="none" style:writing-mode="lr-tb"/>
      <style:text-properties officeooo:paragraph-rsid="0014cbb1"/>
    </style:style>
    <style:style style:name="P96" style:family="paragraph" style:parent-style-name="Text_20_body" style:list-style-name="L39">
      <style:paragraph-properties fo:margin-left="0cm" fo:margin-right="0cm" fo:margin-top="0cm" fo:margin-bottom="0cm" style:contextual-spacing="false" style:line-height-at-least="0.582cm" fo:text-align="justify" style:justify-single-word="false" fo:orphans="2" fo:widows="2" fo:text-indent="0cm" style:auto-text-indent="false" fo:padding="0cm" fo:border="none" style:writing-mode="lr-tb"/>
      <style:text-properties officeooo:paragraph-rsid="00167e5b"/>
    </style:style>
    <style:style style:name="P97" style:family="paragraph" style:parent-style-name="Text_20_body" style:list-style-name="L40">
      <style:paragraph-properties fo:margin-left="0cm" fo:margin-right="0cm" fo:margin-top="0cm" fo:margin-bottom="0cm" style:contextual-spacing="false" style:line-height-at-least="0.582cm" fo:text-align="justify" style:justify-single-word="false" fo:orphans="2" fo:widows="2" fo:text-indent="0cm" style:auto-text-indent="false" fo:padding="0cm" fo:border="none" style:writing-mode="lr-tb"/>
      <style:text-properties officeooo:paragraph-rsid="00167e5b"/>
    </style:style>
    <style:style style:name="P98" style:family="paragraph" style:parent-style-name="Text_20_body" style:list-style-name="L42">
      <style:paragraph-properties fo:margin-left="0cm" fo:margin-right="0cm" fo:margin-top="0cm" fo:margin-bottom="0cm" style:contextual-spacing="false" style:line-height-at-least="0.582cm" fo:text-align="justify" style:justify-single-word="false" fo:orphans="2" fo:widows="2" fo:text-indent="0cm" style:auto-text-indent="false" fo:padding="0cm" fo:border="none" style:writing-mode="lr-tb"/>
      <style:text-properties officeooo:paragraph-rsid="0016956e"/>
    </style:style>
    <style:style style:name="P99" style:family="paragraph" style:parent-style-name="Text_20_body" style:list-style-name="L43">
      <style:paragraph-properties fo:margin-left="0cm" fo:margin-right="0cm" fo:margin-top="0cm" fo:margin-bottom="0cm" style:contextual-spacing="false" style:line-height-at-least="0.582cm" fo:text-align="justify" style:justify-single-word="false" fo:orphans="2" fo:widows="2" fo:text-indent="0cm" style:auto-text-indent="false" fo:padding="0cm" fo:border="none" style:writing-mode="lr-tb"/>
      <style:text-properties officeooo:paragraph-rsid="0016956e"/>
    </style:style>
    <style:style style:name="P100" style:family="paragraph" style:parent-style-name="Text_20_body" style:list-style-name="L47">
      <style:paragraph-properties fo:margin-left="0cm" fo:margin-right="0cm" fo:margin-top="0cm" fo:margin-bottom="0cm" style:contextual-spacing="false" style:line-height-at-least="0.582cm" fo:text-align="justify" style:justify-single-word="false" fo:orphans="2" fo:widows="2" fo:text-indent="0cm" style:auto-text-indent="false" fo:padding="0cm" fo:border="none" style:writing-mode="lr-tb"/>
      <style:text-properties officeooo:paragraph-rsid="0016956e"/>
    </style:style>
    <style:style style:name="P101" style:family="paragraph" style:parent-style-name="Text_20_body" style:list-style-name="L50">
      <style:paragraph-properties fo:margin-left="0cm" fo:margin-right="0cm" fo:margin-top="0cm" fo:margin-bottom="0cm" style:contextual-spacing="false" style:line-height-at-least="0.582cm" fo:text-align="justify" style:justify-single-word="false" fo:orphans="2" fo:widows="2" fo:text-indent="0cm" style:auto-text-indent="false" fo:padding="0cm" fo:border="none" style:writing-mode="lr-tb"/>
      <style:text-properties officeooo:paragraph-rsid="0016956e"/>
    </style:style>
    <style:style style:name="P102" style:family="paragraph" style:parent-style-name="Text_20_body" style:list-style-name="L57">
      <style:paragraph-properties fo:margin-left="0cm" fo:margin-right="0cm" fo:margin-top="0cm" fo:margin-bottom="0cm" style:contextual-spacing="false" style:line-height-at-least="0.582cm" fo:text-align="justify" style:justify-single-word="false" fo:orphans="2" fo:widows="2" fo:text-indent="0cm" style:auto-text-indent="false" fo:padding="0cm" fo:border="none" style:writing-mode="lr-tb"/>
      <style:text-properties officeooo:paragraph-rsid="0016956e"/>
    </style:style>
    <style:style style:name="P103" style:family="paragraph" style:parent-style-name="Text_20_body">
      <style:paragraph-properties fo:margin-left="0cm" fo:margin-right="0cm" fo:margin-top="0cm" fo:margin-bottom="0.318cm" style:contextual-spacing="false" style:line-height-at-least="0.635cm" fo:text-align="justify" style:justify-single-word="false" fo:orphans="2" fo:widows="2" fo:text-indent="0cm" style:auto-text-indent="false"/>
      <style:text-properties style:font-name="Laksaman"/>
    </style:style>
    <style:style style:name="P104" style:family="paragraph" style:parent-style-name="Text_20_body">
      <style:paragraph-properties fo:text-align="justify" style:justify-single-word="false"/>
      <style:text-properties style:font-name="Laksaman" fo:font-size="12pt" style:font-size-asian="12pt" style:font-size-complex="12pt"/>
    </style:style>
    <style:style style:name="P105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Laksaman"/>
    </style:style>
    <style:style style:name="P106" style:family="paragraph" style:parent-style-name="Text_20_body">
      <style:paragraph-properties fo:margin-top="0cm" fo:margin-bottom="0cm" style:contextual-spacing="false" fo:text-align="justify" style:justify-single-word="false"/>
    </style:style>
    <style:style style:name="P107" style:family="paragraph" style:parent-style-name="Text_20_body">
      <style:paragraph-properties fo:margin-left="0cm" fo:margin-right="0cm" fo:margin-top="0cm" fo:margin-bottom="0.635cm" style:contextual-spacing="false" style:line-height-at-least="0.741cm" fo:text-align="justify" style:justify-single-word="false" fo:orphans="2" fo:widows="2" fo:text-indent="0cm" style:auto-text-indent="false"/>
      <style:text-properties officeooo:paragraph-rsid="0014cbb1"/>
    </style:style>
    <style:style style:name="P108" style:family="paragraph" style:parent-style-name="Text_20_body">
      <style:paragraph-properties fo:margin-left="0cm" fo:margin-right="0cm" fo:margin-top="0cm" fo:margin-bottom="0.635cm" style:contextual-spacing="false" style:line-height-at-least="0.741cm" fo:text-align="justify" style:justify-single-word="false" fo:orphans="2" fo:widows="2" fo:text-indent="0cm" style:auto-text-indent="false"/>
      <style:text-properties fo:font-weight="bold" officeooo:paragraph-rsid="0014cbb1" style:font-weight-asian="bold" style:font-weight-complex="bold"/>
    </style:style>
    <style:style style:name="T1" style:family="text">
      <style:text-properties fo:font-variant="normal" fo:text-transform="none" fo:color="#0a0a0a" loext:opacity="100%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a0a0a" loext:opacity="100%" style:font-name="Laksaman" fo:font-size="12pt" fo:letter-spacing="normal" fo:font-style="normal"/>
    </style:style>
    <style:style style:name="T3" style:family="text">
      <style:text-properties fo:font-variant="normal" fo:text-transform="none" fo:color="#0a0a0a" loext:opacity="100%" style:font-name="Laksaman" fo:font-size="12pt" fo:letter-spacing="normal" fo:font-style="normal" fo:font-weight="normal"/>
    </style:style>
    <style:style style:name="T4" style:family="text">
      <style:text-properties fo:font-variant="normal" fo:text-transform="none" fo:color="#0a0a0a" loext:opacity="100%" style:font-name="Laksaman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a0a0a" loext:opacity="100%" style:font-name="Laksaman" fo:font-size="12pt" fo:letter-spacing="normal" fo:font-style="normal" fo:font-weight="normal" officeooo:rsid="0016956e" style:font-size-asian="12pt" style:font-size-complex="12pt"/>
    </style:style>
    <style:style style:name="T6" style:family="text">
      <style:text-properties fo:font-variant="normal" fo:text-transform="none" fo:color="#0a0a0a" loext:opacity="100%" style:font-name="Laksaman" fo:font-size="12pt" fo:letter-spacing="normal" fo:font-style="normal" fo:font-weight="normal" fo:background-color="#f0f2f5" loext:char-shading-value="0" style:font-size-asian="12pt" style:font-size-complex="12pt" loext:padding-left="0cm" loext:padding-right="0cm" loext:padding-top="0.049cm" loext:padding-bottom="0.053cm" loext:border-left="none" loext:border-right="none" loext:border-top="0.74pt solid #f0f2f5" loext:border-bottom="0.74pt solid #f0f2f5"/>
    </style:style>
    <style:style style:name="T7" style:family="text">
      <style:text-properties fo:font-variant="normal" fo:text-transform="none" fo:color="#0a0a0a" loext:opacity="100%" style:font-name="Laksaman" fo:font-size="12pt" fo:letter-spacing="normal" fo:font-style="normal" fo:font-weight="bold"/>
    </style:style>
    <style:style style:name="T8" style:family="text">
      <style:text-properties fo:font-variant="normal" fo:text-transform="none" fo:color="#0a0a0a" loext:opacity="100%" style:font-name="Laksaman" fo:font-size="12pt" fo:letter-spacing="normal" fo:font-style="normal" fo:font-weight="bold" style:font-size-asian="12pt" style:font-size-complex="12pt"/>
    </style:style>
    <style:style style:name="T9" style:family="text">
      <style:text-properties fo:font-variant="normal" fo:text-transform="none" fo:color="#0a0a0a" loext:opacity="100%" style:font-name="Laksaman" fo:font-size="12pt" fo:letter-spacing="normal" fo:font-style="italic" fo:font-weight="normal"/>
    </style:style>
    <style:style style:name="T10" style:family="text">
      <style:text-properties fo:font-variant="normal" fo:text-transform="none" fo:color="#0a0a0a" loext:opacity="100%" style:font-name="Laksaman" fo:font-size="12pt" fo:letter-spacing="normal" fo:font-style="italic" fo:font-weight="normal" style:font-size-asian="12pt" style:font-size-complex="12pt"/>
    </style:style>
    <style:style style:name="T11" style:family="text">
      <style:text-properties fo:font-variant="normal" fo:text-transform="none" fo:color="#0a0a0a" loext:opacity="100%" style:font-name="Laksaman" fo:font-size="10.5pt" fo:letter-spacing="normal" fo:font-style="normal" fo:font-weight="normal" fo:background-color="#f0f2f5" loext:char-shading-value="0" loext:padding-left="0cm" loext:padding-right="0cm" loext:padding-top="0.049cm" loext:padding-bottom="0.053cm" loext:border-left="none" loext:border-right="none" loext:border-top="0.74pt solid #f0f2f5" loext:border-bottom="0.74pt solid #f0f2f5"/>
    </style:style>
    <style:style style:name="T12" style:family="text">
      <style:text-properties fo:font-variant="normal" fo:text-transform="none" fo:color="#0a0a0a" loext:opacity="100%" style:font-name="Laksaman" fo:font-size="15pt" fo:letter-spacing="normal" fo:font-style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5pt" fo:font-style="normal"/>
    </style:style>
    <style:style style:name="T16" style:family="text">
      <style:text-properties fo:color="#56595e" loext:opacity="100%" fo:font-size="8.25pt" fo:font-style="normal" fo:font-weight="bold"/>
    </style:style>
    <style:style style:name="T17" style:family="text">
      <style:text-properties style:font-name="Laksaman"/>
    </style:style>
    <style:style style:name="T18" style:family="text">
      <style:text-properties officeooo:rsid="000f261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6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9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12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15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1">MEMOS TRADING OTONOM ROBOTIC TRADER SYSTEM GELİŞTRİME</text:p>
      <text:p text:style-name="P4"/>
      <text:p text:style-name="P4"><text:tab/>Harika bir veri seti ve analiz. Elindeki bu "post-mortem" (otopsi) raporu, otonom bir sistemin çocukluk hastalıklarını net bir şekilde gösteriyor. Karın şansa dayalı (stale pozisyon), zararın ise sistemsel (matematiksel negatif beklenti) olduğu bir yapıdasın.</text:p>
      <text:p text:style-name="P12"><text:span text:style-name="T4">Notlarını ve AI analizini temel alarak; </text:span><text:span text:style-name="Strong_20_Emphasis"><text:span text:style-name="T8">kaymaları (slippage) sıfırlayacak, maliyeti düşürecek ve stratejik evrimi rasyonelleştirecek</text:span></text:span><text:span text:style-name="T4"> ileri düzey çözüm mimarisini şu maddelerle kurgulayalım:</text:span></text:p>
      <text:p text:style-name="P12"><text:span text:style-name="T4"/></text:p>
      <text:p text:style-name="P12"><text:span text:style-name="T4"/></text:p>
      <text:p text:style-name="P2">1. <text:span text:style-name="T14">WS/REST Fiyat Sapması ve "Latency Arbitrage" Filtresi</text:span></text:p>
      <text:p text:style-name="P3"><text:tab/>%0.7'lik <text:span text:style-name="T18">sa</text:span>pma, emir gönderdiğin anda zaten teknik olarak terste kalman demektir.</text:p>
      <text:list xml:id="list2522443807" text:style-name="L12">
        <text:list-item>
          <text:p text:style-name="P86"><text:span text:style-name="Strong_20_Emphasis"><text:span text:style-name="T8">Çözüm </text:span></text:span></text:p>
          <text:list>
            <text:list-header>
              <text:p text:style-name="P86"><text:span text:style-name="Strong_20_Emphasis"><text:span text:style-name="T8">(Price Sync Guard):</text:span></text:span><text:span text:style-name="T4"> Motoruna bir </text:span><text:span text:style-name="Strong_20_Emphasis"><text:span text:style-name="T8">"Execution Gate"</text:span></text:span><text:span text:style-name="T4"> ekle. </text:span><text:span text:style-name="Source_20_Text"><text:span text:style-name="T6">abs(WS_Price - REST_Price) / REST_Price &gt; 0.001</text:span></text:span><text:span text:style-name="T4"> (yani %0.1 sapma) ise emri gönderme, </text:span><text:span text:style-name="Source_20_Text"><text:span text:style-name="T6">LOG: High Slippage Risk</text:span></text:span><text:span text:style-name="T4"> uyarısı ver ve 500ms bekle.</text:span></text:p>
            </text:list-header>
          </text:list>
          <text:p text:style-name="P85"><text:span text:style-name="T4"/></text:p>
        </text:list-item>
        <text:list-item>
          <text:p text:style-name="P34"><text:span text:style-name="Strong_20_Emphasis"><text:span text:style-name="T8">Teknik Formül:</text:span></text:span></text:p>
          <text:list>
            <text:list-header>
              <text:p text:style-name="P34"><text:span text:style-name="T4">Fiyatı sadece son gelen bar üzerinden değil, son 5 saniyelik </text:span><text:span text:style-name="Strong_20_Emphasis"><text:span text:style-name="T8">VWAP (Volume Weighted Average Price)</text:span></text:span><text:span text:style-name="T4"> üzerinden hesapla. Bu, anlık iğne (spike) hareketlerinde sistemin "fiyat uçtu" sanıp yanlış yerden girmesini engeller.</text:span></text:p>
            </text:list-header>
          </text:list>
        </text:list-item>
      </text:list>
      <text:p text:style-name="P14"/>
      <text:p text:style-name="P22"/>
      <text:p text:style-name="P22"/>
      <text:p text:style-name="P22"/>
      <text:p text:style-name="P22"><text:soft-page-break/></text:p>
      <text:p text:style-name="P22"/>
      <text:p text:style-name="P22">2. %100 Limit Order (Maker) Yönetimi</text:p>
      <text:p text:style-name="P15"><text:tab/>Taker (piyasa) emri, özellikle volatil altcoinlerde (HIGH, RAVE) kâr katilidir.</text:p>
      <text:list xml:id="list4088093538" text:style-name="L13">
        <text:list-item>
          <text:p text:style-name="P88"><text:span text:style-name="Strong_20_Emphasis"><text:span text:style-name="T8">Post-Only Limit:</text:span></text:span></text:p>
          <text:list>
            <text:list-header>
              <text:p text:style-name="P88"><text:span text:style-name="T4">Tüm girişleri </text:span><text:span text:style-name="Source_20_Text"><text:span text:style-name="T6">Binance POST_ONLY</text:span></text:span><text:span text:style-name="T4"> bayrağı ile gönder. Eğer emir o anki fiyattan dolayı hemen dolacaksa (taker olacaksa), borsa bu emri otomatik iptal eder. Bu seni komisyon iadesine (rebate) veya en düşük komisyon dilimine sokar.</text:span></text:p>
            </text:list-header>
          </text:list>
          <text:p text:style-name="P87"><text:span text:style-name="T4"/></text:p>
        </text:list-item>
        <text:list-item>
          <text:p text:style-name="P35"><text:span text:style-name="Strong_20_Emphasis"><text:span text:style-name="T8">Dynamic Limit Chasing:</text:span></text:span></text:p>
          <text:list>
            <text:list-header>
              <text:p text:style-name="P35"><text:span text:style-name="T4">Emir dolmazsa, fiyatın peşinden koşmak yerine emri iptal et. Scalp'ta "ya o fiyattan alırım ya da hiç almam" felsefesi şarttır.</text:span></text:p>
            </text:list-header>
          </text:list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2"><text:soft-page-break/>3. ML Tabanlı Strateji Rotasyonu (Mini-Evrim Yerine Rejim Tespiti)</text:p>
      <text:p text:style-name="P15"><text:tab/>Loglardaki 15 dakikada 6 strateji değişikliği "overfitting" (aşırı uyum) ve panik belirtisidir.</text:p>
      <text:list xml:id="list1231014401" text:style-name="L14">
        <text:list-item>
          <text:p text:style-name="P37"><text:span text:style-name="Strong_20_Emphasis"><text:span text:style-name="T8">HMM (Hidden Markov Model):</text:span></text:span></text:p>
          <text:list>
            <text:list-item>
              <text:list>
                <text:list-header>
                  <text:p text:style-name="P37"><text:span text:style-name="T4">Piyasayı 3 modda tanımla: </text:span><text:span text:style-name="Strong_20_Emphasis"><text:span text:style-name="T8">Trend, Range (Yatay), Volatil/Kaos.</text:span></text:span><text:span text:style-name="T4"> Strateji değişikliğini "3 zarar" gibi basit bir şarta değil, piyasanın rejim değişikliğine bağla.</text:span></text:p>
                  <text:p text:style-name="P37"><text:span text:style-name="T4"/></text:p>
                  <text:p text:style-name="P36"><text:span text:style-name="Emphasis"><text:span text:style-name="T10">Örnek:</text:span></text:span><text:span text:style-name="T4"> ADX &lt; 20 ise sadece Mean Reversion (BB, RSI) çalıştır. ADX &gt; 25 ise Trend takipçileri (Supertrend, EMA) devreye girsin.</text:span></text:p>
                </text:list-header>
              </text:list>
            </text:list-item>
          </text:list>
        </text:list-item>
        <text:list-item>
          <text:p text:style-name="P37"><text:span text:style-name="Strong_20_Emphasis"><text:span text:style-name="T8">Cool-off Period:</text:span></text:span></text:p>
          <text:list>
            <text:list-item>
              <text:list>
                <text:list-header>
                  <text:p text:style-name="P37"><text:span text:style-name="T4">Bir strateji 3 kez üst üste stop olduysa, sistemi 1 saat "Sadece İzleme" moduna al. Piyasa senin algoritmanla kavga ediyorsa, kavgayı bırak.</text:span></text:p>
                </text:list-header>
              </text:list>
            </text:list-item>
          </text:list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2"><text:soft-page-break/>4. RR (Risk/Reward) ve SL/TP Simetrisi Reformu</text:p>
      <text:p text:style-name="P15"><text:tab/>Mevcut RR ~1.1 ile hayatta kalamazsın.</text:p>
      <text:list xml:id="list3429363273" text:style-name="L15">
        <text:list-item>
          <text:p text:style-name="P89"><text:span text:style-name="Strong_20_Emphasis"><text:span text:style-name="T8">Asimetrik Guard:</text:span></text:span></text:p>
          <text:list>
            <text:list-header>
              <text:p text:style-name="P89"><text:span text:style-name="T4">Giriş anında </text:span><text:span text:style-name="Source_20_Text"><text:span text:style-name="T6">Expected_TP / Expected_SL &lt; 2.0</text:span></text:span><text:span text:style-name="T4"> ise o trade'i baştan reddet (Min RR Gate).</text:span></text:p>
              <text:p text:style-name="P89"><text:span text:style-name="T4"/></text:p>
            </text:list-header>
          </text:list>
        </text:list-item>
        <text:list-item>
          <text:p text:style-name="P38"><text:span text:style-name="Strong_20_Emphasis"><text:span text:style-name="T8">Volatility-Adjusted SL:</text:span></text:span></text:p>
          <text:list>
            <text:list-header>
              <text:p text:style-name="P38"><text:span text:style-name="T4">Sabit ATR çarpanı yerine, son 24 saatlik </text:span><text:span text:style-name="Strong_20_Emphasis"><text:span text:style-name="T8">Standard Sapma</text:span></text:span><text:span text:style-name="T4">'yı kullan. Eğer volatilite (RAVE örneğindeki gibi) normalin 2-3 katına çıktıysa, pozisyon büyüklüğünü (Notional) %50 küçült veya hiç girme.</text:span></text:p>
              <text:p text:style-name="P38"><text:span text:style-name="T4"/></text:p>
            </text:list-header>
          </text:list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2"><text:soft-page-break/>5. Otonom "Blacklist" ve "Performance Ranking"</text:p>
      <text:list xml:id="list4132148763" text:style-name="L16">
        <text:list-item>
          <text:p text:style-name="P39"><text:span text:style-name="Strong_20_Emphasis"><text:span text:style-name="T8">Self-Correction:</text:span></text:span></text:p>
          <text:list>
            <text:list-header>
              <text:p text:style-name="P39"><text:span text:style-name="T4">Bir sembol son 10 işlemde kümülatif PnL'e negatif etki ediyorsa, onu 24 saatliğine otomatik karantinaya al (Dynamic Blacklisting).</text:span></text:p>
              <text:p text:style-name="P39"><text:span text:style-name="T4"/></text:p>
            </text:list-header>
          </text:list>
        </text:list-item>
        <text:list-item>
          <text:p text:style-name="P39"><text:span text:style-name="Strong_20_Emphasis"><text:span text:style-name="T8">BTC/ETH Çapası:</text:span></text:span></text:p>
          <text:list>
            <text:list-header>
              <text:p text:style-name="P39"><text:span text:style-name="T4">Scalp işlemlerinde sadece BTC veya ETH yönüyle uyumlu (correlation &gt; 0.7) altcoinlere izin ver. Piyasa yapıcıya karşı değil, piyasa akıntısıyla beraber yüz.</text:span></text:p>
            </text:list-header>
          </text:list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2"><text:soft-page-break/>6. Teknik Uygulama Önerisi (Mimari)</text:p>
      <text:list xml:id="list1213164479" text:style-name="L17">
        <text:list-item>
          <text:p text:style-name="P90"><text:span text:style-name="Strong_20_Emphasis"><text:span text:style-name="T8">Database Hygiene:</text:span></text:span></text:p>
          <text:list>
            <text:list-header>
              <text:p text:style-name="P90"><text:span text:style-name="T4">DB snapshot'tan dönen "stale" (bayat) pozisyonlar için bir </text:span><text:span text:style-name="Source_20_Text"><text:span text:style-name="T6">SessionID</text:span></text:span><text:span text:style-name="T4"> kontrolü ekle. Yeni session başladığında, DB'de kalan ama aktif borsa API'sinde karşılığı olmayan veya fiyatı çok sapmış pozisyonları "Manual Exit Required" olarak işaretle, otomatik PnL'e dahil etme.</text:span></text:p>
              <text:p text:style-name="P90"><text:span text:style-name="T4"/></text:p>
            </text:list-header>
          </text:list>
        </text:list-item>
        <text:list-item>
          <text:p text:style-name="P40"><text:span text:style-name="Strong_20_Emphasis"><text:span text:style-name="T8">ML Evrimi:</text:span></text:span></text:p>
          <text:list>
            <text:list-header>
              <text:p text:style-name="P40"><text:span text:style-name="T4">Parametreleri rastgele değiştirmek yerine, başarılı olan 71 işlemin ortak özelliklerini (Hangi saatte? Hangi RSI değerinde? Hangi volatilitede?) analiz eden basit bir </text:span><text:span text:style-name="Strong_20_Emphasis"><text:span text:style-name="T8">Random Forest</text:span></text:span><text:span text:style-name="T4"> sınıflandırıcıyı arka planda eğit ve giriş sinyallerini bu filtreden geçir.</text:span></text:p>
            </text:list-header>
          </text:list>
        </text:list-item>
      </text:list>
      <text:p text:style-name="P82"><text:span text:style-name="Strong_20_Emphasis"><text:span text:style-name="T8">Özet Tavsiye:</text:span></text:span></text:p>
      <text:p text:style-name="P82"><text:span text:style-name="Strong_20_Emphasis"><text:span text:style-name="T8"><text:tab/></text:span></text:span><text:span text:style-name="T4">Scalp modunu bir süreliğine </text:span><text:span text:style-name="Strong_20_Emphasis"><text:span text:style-name="T8">"Paper Trading"</text:span></text:span><text:span text:style-name="T4"> veya </text:span><text:span text:style-name="Strong_20_Emphasis"><text:span text:style-name="T8">"Minimum Size"</text:span></text:span><text:span text:style-name="T4"> moduna alıp, sadece Swing ve REG (orphan olmayan versiyonu) işlemlerine odaklanmak sermayeni koruyacaktır.</text:span></text:p>
      <text:p text:style-name="P41"><text:span text:style-name="T4"><text:tab/>Şu anki loglarda en acil müdahale edilmesi gereken konu </text:span><text:span text:style-name="Strong_20_Emphasis"><text:span text:style-name="T8">HIGHUSDT gibi "sistem katili" sembollerin filtrelenmesi</text:span></text:span><text:span text:style-name="T4"> ve </text:span><text:span text:style-name="Strong_20_Emphasis"><text:span text:style-name="T8">Limit Order</text:span></text:span><text:span text:style-name="T4"> geçişidir.</text:span></text:p>
      <text:p text:style-name="P103"><text:span text:style-name="T1"/></text:p>
      <text:p text:style-name="P103"><text:span text:style-name="T1"/></text:p>
      <text:p text:style-name="P103"><text:span text:style-name="T1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8"><text:soft-page-break/>1. "Limit Order" ve "Market Making" Yaklaşımı (Maliyet Yönetimi)</text:p>
      <text:p text:style-name="P5">Sistemde "Taker" emri yasaklıyoruz. Teknik olarak şu formülü uygulayalım:</text:p>
      <text:list xml:id="list3268102980" text:style-name="L18">
        <text:list-item>
          <text:p text:style-name="P91"><text:span text:style-name="Strong_20_Emphasis"><text:span text:style-name="T7">Dynamic Tick Offset:</text:span></text:span></text:p>
          <text:list>
            <text:list-header>
              <text:p text:style-name="P91"><text:span text:style-name="T3">Emri tahtanın en üstüne (Best Bid/Ask) değil, </text:span><text:span text:style-name="Source_20_Text"><text:span text:style-name="T11">Best_Bid + 1 Tick</text:span></text:span><text:span text:style-name="T3"> (long için) şeklinde yerleştir.</text:span></text:p>
              <text:p text:style-name="P91"><text:span text:style-name="T3"/></text:p>
            </text:list-header>
          </text:list>
        </text:list-item>
        <text:list-item>
          <text:p text:style-name="P42"><text:span text:style-name="Strong_20_Emphasis"><text:span text:style-name="T7">Re-Quoting (Yenileme):</text:span></text:span></text:p>
          <text:list>
            <text:list-header>
              <text:p text:style-name="P42"><text:span text:style-name="T3">Eğer fiyat senin limit emrinden uzaklaşırsa, emri iptal edip yeni fiyata taşıma işlemini (chasing) maksimum 3 kez yap. Hala dolmadıysa "fırsat kaçtı" de ve işlemi iptal et. Bu, slippage (kayma) maliyetini sıfıra indirir.</text:span></text:p>
              <text:p text:style-name="P42"><text:span text:style-name="T3"/></text:p>
            </text:list-header>
          </text:list>
        </text:list-item>
        <text:list-item>
          <text:p text:style-name="P42"><text:span text:style-name="Strong_20_Emphasis"><text:span text:style-name="T7">Maker Rebate:</text:span></text:span></text:p>
          <text:list>
            <text:list-header>
              <text:p text:style-name="P42"><text:span text:style-name="T3">Bu yöntemle sadece zarar durdurma (SL) sırasında piyasa emri kullanırsın, girişlerin tamamı borsa komisyonunu minimize eder.</text:span></text:p>
              <text:p text:style-name="P42"><text:span text:style-name="T3"/></text:p>
            </text:list-header>
          </text:list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text:soft-page-break/>2. WS/REST Senkronizasyon Motoru (Fiyat Doğruluğu)</text:p>
      <text:p text:style-name="P16">Fiyat sapmasını (Divergence) otonom olarak şu şekilde çözebiliriz:</text:p>
      <text:list xml:id="list3355361844" text:style-name="L19">
        <text:list-item>
          <text:p text:style-name="P92"><text:span text:style-name="Strong_20_Emphasis"><text:span text:style-name="T7">Pre-Trade Check:</text:span></text:span></text:p>
          <text:list>
            <text:list-header>
              <text:p text:style-name="P92"><text:span text:style-name="Source_20_Text"><text:span text:style-name="T11">if abs(ws_price - rest_price) / rest_price &gt; threshold: skip_trade</text:span></text:span><text:span text:style-name="T3">. Buradaki eşik (threshold) senin için %0.1 veya %0.2 olmalı.</text:span></text:p>
              <text:p text:style-name="P92"><text:span text:style-name="T3"/></text:p>
            </text:list-header>
          </text:list>
        </text:list-item>
        <text:list-item>
          <text:p text:style-name="P43"><text:span text:style-name="Strong_20_Emphasis"><text:span text:style-name="T7">Fiyat Kaynağı Ağırlıklandırma:</text:span></text:span></text:p>
          <text:list>
            <text:list-header>
              <text:p text:style-name="P43"><text:span text:style-name="T3">Eğer WebSocket gecikiyorsa, sistem otomatik olarak REST API'den aldığı "Order Book Snapshot" verisine ağırlık vermeli. Bu, HIGHUSDT örneğindeki gibi %0.7'lik "hayali" fiyatlardan korunmanı sağlar.</text:span></text:p>
              <text:p text:style-name="P43"><text:span text:style-name="T3"/></text:p>
            </text:list-header>
          </text:list>
        </text:list-item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><text:soft-page-break/>3. Evrim, AI ve ML ile Strateji Geliştirme</text:p>
      <text:p text:style-name="P16">Mevcut "3 kayıp sonrası strateji değiştir" mantığı çok ilkel. Bunun yerine:</text:p>
      <text:list xml:id="list2216613277" text:style-name="L20">
        <text:list-item>
          <text:p text:style-name="P44"><text:span text:style-name="Strong_20_Emphasis"><text:span text:style-name="T7">Feature Engineering (Özellik Mühendisliği):</text:span></text:span></text:p>
          <text:list>
            <text:list-header>
              <text:p text:style-name="P44"><text:span text:style-name="T3">Sisteme her işlemde şu verileri kaydet: </text:span><text:span text:style-name="Emphasis"><text:span text:style-name="T9">O anki Volatilite (ATR), RSI değeri, Fonlama oranı, Long/Short oranı ve BTC korelasyonu.</text:span></text:span></text:p>
              <text:p text:style-name="P44"><text:span text:style-name="Emphasis"><text:span text:style-name="T9"/></text:span></text:p>
            </text:list-header>
          </text:list>
        </text:list-item>
        <text:list-item>
          <text:p text:style-name="P44"><text:span text:style-name="Strong_20_Emphasis"><text:span text:style-name="T7">Reinforcement Learning (Pekiştirmeli Öğrenme):</text:span></text:span></text:p>
          <text:list>
            <text:list-header>
              <text:p text:style-name="P44"><text:span text:style-name="T3">Sistem, hangi stratejinin (Scalp, Swing, REG) hangi piyasa koşulunda (Yatay vs. Trend) daha iyi çalıştığını 100 işlemde bir "Scoring" (puanlama) yaparak öğrenmeli.</text:span></text:p>
              <text:p text:style-name="P44"><text:span text:style-name="T3"/></text:p>
            </text:list-header>
          </text:list>
        </text:list-item>
        <text:list-item>
          <text:p text:style-name="P44"><text:span text:style-name="Strong_20_Emphasis"><text:span text:style-name="T7">Otonom Karar:</text:span></text:span></text:p>
          <text:list>
            <text:list-header>
              <text:p text:style-name="P44"><text:span text:style-name="T3">AI, "Şu an volatilite %20'nin üzerinde, Scalp stratejisini devre dışı bırakıyorum ve sadece Swing/Limit moduna geçiyorum" diyebilmeli.</text:span></text:p>
              <text:p text:style-name="P44"><text:span text:style-name="T3"/></text:p>
            </text:list-header>
          </text:list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text:soft-page-break/>4. Hassas Hata ve Risk Kontrolü (Hassasiyetle El Atma)</text:p>
      <text:list xml:id="list1921549393" text:style-name="L21">
        <text:list-item>
          <text:p text:style-name="P45"><text:span text:style-name="Strong_20_Emphasis"><text:span text:style-name="T7">Startup Recovery (Açılış Temizliği):</text:span></text:span></text:p>
          <text:list>
            <text:list-header>
              <text:p text:style-name="P45"><text:span text:style-name="T3">Sistem her açıldığında "Orphan" (yetim) pozisyon taraması yapmalı. Eğer DB'deki pozisyon ile borsa fiyatı arasında %2'den fazla fark varsa, sistem bunu "stale" (bayat) kabul edip en uygun Limit çıkışını yapmalı.</text:span></text:p>
              <text:p text:style-name="P45"><text:span text:style-name="T3"/></text:p>
            </text:list-header>
          </text:list>
        </text:list-item>
        <text:list-item>
          <text:p text:style-name="P45"><text:span text:style-name="Strong_20_Emphasis"><text:span text:style-name="T7">High-Frequency Blacklisting:</text:span></text:span></text:p>
          <text:list>
            <text:list-header>
              <text:p text:style-name="P45"><text:span text:style-name="T3">Bir sembol (örn: RAVE) son 1 saatte 2 kez "Slippage Error" veya "TP Gap" verdiyse, otonom olarak 4 saatliğine işlem listesinden çıkarılmalı.</text:span></text:p>
              <text:p text:style-name="P45"><text:span text:style-name="T3"/></text:p>
            </text:list-header>
          </text:list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text:soft-page-break/>5. Somut İyileştirme Planı (Özet)</text:p>
      <text:list xml:id="list3090583616" text:style-name="L22">
        <text:list-item>
          <text:p text:style-name="P93"><text:span text:style-name="Strong_20_Emphasis"><text:span text:style-name="T7">Emir Türü:</text:span></text:span><text:span text:style-name="T3"> %100 </text:span><text:span text:style-name="Source_20_Text"><text:span text:style-name="T11">Post-Only Limit Order</text:span></text:span><text:span text:style-name="T3">.</text:span></text:p>
        </text:list-item>
        <text:list-item>
          <text:p text:style-name="P46"><text:span text:style-name="Strong_20_Emphasis"><text:span text:style-name="T7">Filtre:</text:span></text:span><text:span text:style-name="T3"> WS/REST farkı &gt; %0.15 ise girişi engelle.</text:span></text:p>
        </text:list-item>
        <text:list-item>
          <text:p text:style-name="P93"><text:span text:style-name="Strong_20_Emphasis"><text:span text:style-name="T7">RR Ratio:</text:span></text:span><text:span text:style-name="T3"> Minimum 1:2 zorunluluğu (Kod seviyesinde </text:span><text:span text:style-name="Source_20_Text"><text:span text:style-name="T11">gatekeeper</text:span></text:span><text:span text:style-name="T3">).</text:span></text:p>
        </text:list-item>
        <text:list-item>
          <text:p text:style-name="P46"><text:span text:style-name="Strong_20_Emphasis"><text:span text:style-name="T7">AI:</text:span></text:span><text:span text:style-name="T3"> Strateji değişimini "zarar sayısına" değil, "piyasa rejimine" (Trend/Range tespiti) bağla.</text:span></text:p>
        </text:list-item>
      </text:list>
      <text:p text:style-name="P103"><text:span text:style-name="T1"/></text:p>
      <text:p text:style-name="P103"><text:span text:style-name="T1"/></text:p>
      <text:p text:style-name="P12"><text:span text:style-name="T4"><text:tab/>Bu paylaştığın </text:span><text:span text:style-name="Strong_20_Emphasis"><text:span text:style-name="T8">Üst Düzey Sistem Mimarisi</text:span></text:span><text:span text:style-name="T4">, önceki analizde belirttiğimiz tüm kronik sorunları (slippage, yanlış strateji rotasyonu, sapma hataları) kökten çözecek </text:span><text:span text:style-name="Strong_20_Emphasis"><text:span text:style-name="T8">profesyonel bir endüstriyel yapıya</text:span></text:span><text:span text:style-name="T4"> karşılık geliyor. Mevcut "kaotik" yapıdan "karar destekli" bir yapıya geçiş için bu akış tam olarak ihtiyaç duyulan şeydir.</text:span></text:p>
      <text:p text:style-name="P5"><text:tab/>Bu mimariyi daha da güçlendirecek ve otonom hassasiyeti artıracak kritik dokunuşlar şunlardır:</text:p>
      <text:p text:style-name="P7"/>
      <text:p text:style-name="P9">1. Market Data &amp; Normalization Layer (Gecikme Savar)</text:p>
      <text:list xml:id="list306870881" text:style-name="L23">
        <text:list-item>
          <text:p text:style-name="P47"><text:span text:style-name="Strong_20_Emphasis"><text:span text:style-name="T7">Katkısı:</text:span></text:span></text:p>
          <text:list>
            <text:list-header>
              <text:p text:style-name="P47"><text:span text:style-name="T3">Raporundaki %0.7'lik WS/REST farkını burada bitirirsin.</text:span></text:p>
            </text:list-header>
          </text:list>
        </text:list-item>
        <text:list-item>
          <text:p text:style-name="P47"><text:span text:style-name="Strong_20_Emphasis"><text:span text:style-name="T7">Gelişmiş Formül:</text:span></text:span></text:p>
          <text:list>
            <text:list-header>
              <text:p text:style-name="P47"><text:span text:style-name="T3">Sadece fiyatı değil, </text:span><text:span text:style-name="Strong_20_Emphasis"><text:span text:style-name="T7">"Order Book Imbalance"</text:span></text:span><text:span text:style-name="T3"> (emir defteri dengesizliği) verisini de normalize et. Eğer alış kademeleri boşsa (liquidity gap), sistem fiyat uygun olsa bile limit emri göndermez. Böylece HIGHUSDT gibi likidite tuzaklarından korunursun.</text:span></text:p>
              <text:p text:style-name="P47"><text:span text:style-name="T3"/></text:p>
            </text:list-header>
          </text:list>
        </text:list-item>
      </text:list>
      <text:p text:style-name="P23"/>
      <text:p text:style-name="P23"/>
      <text:p text:style-name="P23"/>
      <text:p text:style-name="P25"><text:soft-page-break/>2. Market Regime Engine (Zeka Merkezi)</text:p>
      <text:list xml:id="list2124031650" text:style-name="L24">
        <text:list-item>
          <text:p text:style-name="P48"><text:span text:style-name="Strong_20_Emphasis"><text:span text:style-name="T7">Katkısı:</text:span></text:span></text:p>
          <text:list>
            <text:list-item>
              <text:list>
                <text:list-header>
                  <text:p text:style-name="P48"><text:span text:style-name="T3">"3 kayıp oldu, hadi strateji değiştirelim" hatasını engeller.</text:span></text:p>
                  <text:p text:style-name="P48"><text:span text:style-name="T3"/></text:p>
                </text:list-header>
              </text:list>
            </text:list-item>
          </text:list>
        </text:list-item>
        <text:list-item>
          <text:p text:style-name="P48"><text:span text:style-name="Strong_20_Emphasis"><text:span text:style-name="T7">Gelişmiş Formül:</text:span></text:span></text:p>
          <text:list>
            <text:list-item>
              <text:list>
                <text:list-item>
                  <text:p text:style-name="P48"><text:span text:style-name="T3">Buraya bir </text:span><text:span text:style-name="Strong_20_Emphasis"><text:span text:style-name="T7">"Hurst Exponent"</text:span></text:span><text:span text:style-name="T3"> filtresi ekle.</text:span></text:p>
                </text:list-item>
                <text:list-item>
                  <text:p text:style-name="P19">Hurst &gt; 0.5 ise: Piyasa trenddedir (Supertrend/EMA çalıştır).</text:p>
                </text:list-item>
                <text:list-item>
                  <text:p text:style-name="P18">Hurst &lt; 0.5 ise: Piyasa yataydır (Mean Reversion/BB çalıştır).</text:p>
                </text:list-item>
                <text:list-item>
                  <text:p text:style-name="P18">Bu, strateji rotasyonunu "tesadüfi" olmaktan çıkarıp "matematiksel" bir temele oturtur.</text:p>
                </text:list-item>
              </text:list>
            </text:list-item>
          </text:list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5"><text:soft-page-break/>3. AI Filter (ML Layer) - "İnfaz Kararı"</text:p>
      <text:list xml:id="list557386581" text:style-name="L25">
        <text:list-item>
          <text:p text:style-name="P49"><text:span text:style-name="Strong_20_Emphasis"><text:span text:style-name="T7">Katkısı:</text:span></text:span></text:p>
          <text:list>
            <text:list-header>
              <text:p text:style-name="P49"><text:span text:style-name="T3">Strateji sinyal üretse bile AI "Hayır, bu işlemin kazanma ihtimali düşük" diyebilir.</text:span></text:p>
              <text:p text:style-name="P49"><text:span text:style-name="T3"/></text:p>
            </text:list-header>
          </text:list>
        </text:list-item>
        <text:list-item>
          <text:p text:style-name="P49"><text:span text:style-name="Strong_20_Emphasis"><text:span text:style-name="T7">Teknik Detay:</text:span></text:span></text:p>
          <text:list>
            <text:list-header>
              <text:p text:style-name="P49"><text:span text:style-name="T3">Burada bir </text:span><text:span text:style-name="Strong_20_Emphasis"><text:span text:style-name="T7">XGBoost veya LightGBM</text:span></text:span><text:span text:style-name="T3"> modeli kullanarak; geçmişteki 156 işlemin verileriyle (volatilite, saat, sembol skoru) yeni sinyali test et. Eğer modelin güven skoru %60'ın altındaysa, işlem Risk Engine'e bile gitmeden elenir.</text:span></text:p>
              <text:p text:style-name="P49"><text:span text:style-name="T3"/></text:p>
            </text:list-header>
          </text:list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text:soft-page-break/>4. Execution Engine (Kritik - Limit Order Kontrolü)</text:p>
      <text:list xml:id="list468717411" text:style-name="L26">
        <text:list-item>
          <text:p text:style-name="P50"><text:span text:style-name="Strong_20_Emphasis"><text:span text:style-name="T7">Katkısı:</text:span></text:span></text:p>
          <text:list>
            <text:list-header>
              <text:p text:style-name="P50"><text:span text:style-name="T3">Taker maliyetini (%10'luk kâr kaybını) sıfırlar.</text:span></text:p>
              <text:p text:style-name="P50"><text:span text:style-name="T3"/></text:p>
            </text:list-header>
          </text:list>
        </text:list-item>
        <text:list-item>
          <text:p text:style-name="P50"><text:span text:style-name="Strong_20_Emphasis"><text:span text:style-name="T7">Gelişmiş Formül:</text:span></text:span></text:p>
          <text:list>
            <text:list-header>
              <text:p text:style-name="P50"><text:span text:style-name="Strong_20_Emphasis"><text:span text:style-name="T7">"Time-Weighted Average Price (TWAP) Execution"</text:span></text:span><text:span text:style-name="T3"> mantığını ufak ölçekte uygula. Büyük bir pozisyon açacaksan, bunu tek bir Limit emir yerine, 30 saniyeye yayılmış 3-4 farklı limit kademesine böl. Bu, tahtada iz bırakmanı önler ve daha iyi ortalama fiyat sağlar.</text:span></text:p>
              <text:p text:style-name="P50"><text:span text:style-name="T3"/></text:p>
            </text:list-header>
          </text:list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text:soft-page-break/>5. Evolution / ML Training (Kendi Kendini Onarma)</text:p>
      <text:list xml:id="list2524533432" text:style-name="L27">
        <text:list-item>
          <text:p text:style-name="P51"><text:span text:style-name="Strong_20_Emphasis"><text:span text:style-name="T7">Katkısı:</text:span></text:span></text:p>
          <text:list>
            <text:list-header>
              <text:p text:style-name="P51"><text:span text:style-name="T3">Sistemin her gün daha akıllı olmasını sağlar.</text:span></text:p>
              <text:p text:style-name="P51"><text:span text:style-name="T3"/></text:p>
            </text:list-header>
          </text:list>
        </text:list-item>
        <text:list-item>
          <text:p text:style-name="P51"><text:span text:style-name="Strong_20_Emphasis"><text:span text:style-name="T7">Gelişmiş Formül:</text:span></text:span></text:p>
          <text:list>
            <text:list-header>
              <text:p text:style-name="P51"><text:span text:style-name="Strong_20_Emphasis"><text:span text:style-name="T7">"Walk-Forward Optimization"</text:span></text:span><text:span text:style-name="T3"> kullan. Sistem son 7 günlük veriyi sürekli "backtest" yaparak en iyi RR ve ATR çarpanlarını bulsun ve canlıdaki </text:span><text:span text:style-name="Strong_20_Emphasis"><text:span text:style-name="T7">Risk Engine</text:span></text:span><text:span text:style-name="T3">'e enjekte etsin.</text:span></text:p>
            </text:list-header>
          </text:list>
        </text:list-item>
      </text:list>
      <text:p text:style-name="P83"><text:span text:style-name="T3"/></text:p>
      <text:p text:style-name="P83"><text:span text:style-name="T3"/></text:p>
      <text:p text:style-name="P83"><text:span text:style-name="T3"/></text:p>
      <text:p text:style-name="P83"><text:span text:style-name="T3"/></text:p>
      <text:p text:style-name="P83"><text:span text:style-name="T3"/></text:p>
      <text:p text:style-name="P83"><text:span text:style-name="T3"/></text:p>
      <text:p text:style-name="P83"><text:span text:style-name="T3"/></text:p>
      <text:p text:style-name="P83"><text:span text:style-name="T3"/></text:p>
      <text:p text:style-name="P83"><text:span text:style-name="T3"/></text:p>
      <text:p text:style-name="P83"><text:span text:style-name="T3"/></text:p>
      <text:p text:style-name="P83"><text:span text:style-name="T3"/></text:p>
      <text:p text:style-name="P83"><text:span text:style-name="T3"/></text:p>
      <text:p text:style-name="P83"><text:span text:style-name="T3"/></text:p>
      <text:p text:style-name="P83"><text:span text:style-name="T3"/></text:p>
      <text:p text:style-name="P83"><text:span text:style-name="T3"/></text:p>
      <text:p text:style-name="P83"><text:span text:style-name="T3"/></text:p>
      <text:p text:style-name="P83"><text:span text:style-name="T3"/></text:p>
      <text:p text:style-name="P83"><text:span text:style-name="T3"/></text:p>
      <text:p text:style-name="P83"><text:span text:style-name="T3"/></text:p>
      <text:p text:style-name="P83"><text:span text:style-name="T3"/></text:p>
      <text:p text:style-name="P83"><text:span text:style-name="T3"/></text:p>
      <text:p text:style-name="P83"><text:span text:style-name="T3"/></text:p>
      <text:p text:style-name="P83"><text:span text:style-name="T3"/></text:p>
      <text:p text:style-name="P83"><text:span text:style-name="T3"/></text:p>
      <text:p text:style-name="P83"><text:span text:style-name="T3"/></text:p>
      <text:p text:style-name="P83"><text:span text:style-name="T3"/></text:p>
      <text:p text:style-name="P25"><text:soft-page-break/>Sonuç ve Öneri</text:p>
      <text:p text:style-name="P41"><text:span text:style-name="T3"><text:tab/>Bu mimari akış, sistemini bir "kumar botundan" bir </text:span><text:span text:style-name="Strong_20_Emphasis"><text:span text:style-name="T7">"Hedge Fund Algoritmasına"</text:span></text:span><text:span text:style-name="T3"> dönüştürür. Özellikle </text:span><text:span text:style-name="Strong_20_Emphasis"><text:span text:style-name="T7">Execution Engine</text:span></text:span><text:span text:style-name="T3"> ve </text:span><text:span text:style-name="Strong_20_Emphasis"><text:span text:style-name="T7">Market Regime Engine</text:span></text:span><text:span text:style-name="T3"> katmanları arasındaki bağ, senin raporunda gördüğümüz "negatif beklentiyi" pozitife çevirecek en önemli köprüdür.</text:span></text:p>
      <text:p text:style-name="P13"><text:span text:style-name="T4"><text:tab/></text:span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oft-page-break/><text:span text:style-name="T4"><text:tab/>Bu </text:span><text:span text:style-name="Strong_20_Emphasis"><text:span text:style-name="T8">"Gerçek Zamanlı Karar Akışı"</text:span></text:span><text:span text:style-name="T4">, sistemi bir </text:span><text:span text:style-name="Strong_20_Emphasis"><text:span text:style-name="T8">"fırsat avcısından" (opportunist)</text:span></text:span><text:span text:style-name="T4"> profesyonel bir </text:span><text:span text:style-name="Strong_20_Emphasis"><text:span text:style-name="T8">"risk yöneticisine" (risk manager)</text:span></text:span><text:span text:style-name="T4"> dönüştüren devrim niteliğinde bir adımdır. Mevcut raporundaki o 156 işlemin neden çoğunun zarar yazdığını bu akış üzerinden okursak; eski sistemin bu filtrelerin çoğunu (AI onayı, RR kontrolü, Execution uygunluğu) atlayarak direkt "Order Gönder" aşamasına geçtiğini görüyoruz.</text:span></text:p>
      <text:p text:style-name="P12"><text:span text:style-name="T3">Bu yeni akışı mimariye entegre ettiğimizde oluşacak </text:span><text:span text:style-name="Strong_20_Emphasis"><text:span text:style-name="T7">"Filtreleme Gücü"</text:span></text:span><text:span text:style-name="T3"> ve etkileri şunlardır:</text:span></text:p>
      <text:p text:style-name="P6"/>
      <text:p text:style-name="P8">1. "HAYIR → STOP" Mantığının Matematiksel Zaferi</text:p>
      <text:p text:style-name="P5">Eski sistemde 156 işlem vardı ve WR (kazanma oranı) %45 idi. Bu yeni akışla:</text:p>
      <text:list xml:id="list3677465130" text:style-name="L28">
        <text:list-item>
          <text:p text:style-name="P52"><text:span text:style-name="Strong_20_Emphasis"><text:span text:style-name="T7">Hacim Düşer, Kalite Artar:</text:span></text:span></text:p>
          <text:list>
            <text:list-header>
              <text:p text:style-name="P52"><text:span text:style-name="T3">İşlem sayısı 156'dan belki 40'a düşecek. Ancak elenen o 110 işlem, muhtemelen HIGHUSDT veya RAVEUSDT gibi "AI onaylamayan" veya "RR uygun olmayan" negatif beklentili işlemler olacak.</text:span></text:p>
              <text:p text:style-name="P52"><text:span text:style-name="T3"/></text:p>
            </text:list-header>
          </text:list>
        </text:list-item>
        <text:list-item>
          <text:p text:style-name="P52"><text:span text:style-name="Strong_20_Emphasis"><text:span text:style-name="T7">Overtrading Engellenir:</text:span></text:span></text:p>
          <text:list>
            <text:list-header>
              <text:p text:style-name="P52"><text:span text:style-name="T3">"Sinyal var mı?" sorusu EVET olsa bile AI veya RR "HAYIR" dediği an sistem durur. Bu, botun kendi kendini imha etmesini (mini-evrim kaosu) engeller.</text:span></text:p>
              <text:p text:style-name="P52"><text:span text:style-name="T3"/></text:p>
            </text:list-header>
          </text:list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5"><text:soft-page-break/>2. "Execution Uygun mu? ── HAYIR → WAIT" (Altın Kural)</text:p>
      <text:p text:style-name="P41"><text:span text:style-name="T3">Bu akışın en zekice kısmı burası. Diğer adımlar "STOP" derken, burası </text:span><text:span text:style-name="Strong_20_Emphasis"><text:span text:style-name="T7">"WAIT"</text:span></text:span><text:span text:style-name="T3"> diyor.</text:span></text:p>
      <text:list xml:id="list1499156308" text:style-name="L29">
        <text:list-item>
          <text:p text:style-name="P53"><text:span text:style-name="Strong_20_Emphasis"><text:span text:style-name="T7">Anlamı:</text:span></text:span></text:p>
          <text:list>
            <text:list-header>
              <text:p text:style-name="P53"><text:span text:style-name="T3">"Sinyal doğru, yön doğru ama tahta (orderbook) sığ veya fiyat çok hızlı hareket ediyor. Acele etme, fiyatın istediğimiz Limit kademesine gelmesini bekle."</text:span></text:p>
              <text:p text:style-name="P53"><text:span text:style-name="T3"/></text:p>
            </text:list-header>
          </text:list>
        </text:list-item>
        <text:list-item>
          <text:p text:style-name="P53"><text:span text:style-name="Strong_20_Emphasis"><text:span text:style-name="T7">Sonuç:</text:span></text:span></text:p>
          <text:list>
            <text:list-header>
              <text:p text:style-name="P53"><text:span text:style-name="T3">Bu adım, senin raporundaki </text:span><text:span text:style-name="Strong_20_Emphasis"><text:span text:style-name="T7">%10'luk maliyet yükünü (slippage + taker fee)</text:span></text:span><text:span text:style-name="T3"> direkt olarak ortadan kaldırır. Bot, piyasanın peşinden koşmaz; piyasanın ona gelmesini bekler.</text:span></text:p>
              <text:p text:style-name="P53"><text:span text:style-name="T3"/></text:p>
            </text:list-header>
          </text:list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text:soft-page-break/>3. AI Onayı: "İstatistiksel Gardiyan"</text:p>
      <text:p text:style-name="P41"><text:span text:style-name="T3">AI katmanı burada bir </text:span><text:span text:style-name="Strong_20_Emphasis"><text:span text:style-name="T7">"Filtreleme Katmanı"</text:span></text:span><text:span text:style-name="T3"> olarak çalışır:</text:span></text:p>
      <text:list xml:id="list2117291951" text:style-name="L30">
        <text:list-item>
          <text:p text:style-name="P20">Sinyal "LONG" diyebilir ama AI; "Geçmiş verilerde bu sembol, bu saat diliminde ve bu volatilitede %70 ihtimalle stop olmuş" derse, o trade açılmaz.</text:p>
          <text:p text:style-name="P20"/>
        </text:list-item>
        <text:list-item>
          <text:p text:style-name="P54"><text:span text:style-name="T3">Bu, senin </text:span><text:span text:style-name="Strong_20_Emphasis"><text:span text:style-name="T7">"Startup-SL zinciri"</text:span></text:span><text:span text:style-name="T3"> dediğin, aynı gün içinde defalarca stop olma hatasını kökten çözer.</text:span></text:p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text:soft-page-break/>4. RR Uygun mu? (Matematiksel Eşik)</text:p>
      <text:p text:style-name="P16">Raporundaki en büyük sorun RR'nin 1.1 olmasıydı.</text:p>
      <text:list xml:id="list3499657353" text:style-name="L31">
        <text:list-item>
          <text:p text:style-name="P55"><text:span text:style-name="T3">Bu akışta eğer TP noktası ATR bazlı olarak SL'nin 2 katı (veya hedeflenen oran) değilse, sinyal ne kadar güçlü olursa olsun </text:span><text:span text:style-name="Strong_20_Emphasis"><text:span text:style-name="T7">"STOP"</text:span></text:span><text:span text:style-name="T3"> denir.</text:span></text:p>
          <text:p text:style-name="P55"><text:span text:style-name="T3"/></text:p>
        </text:list-item>
        <text:list-item>
          <text:p text:style-name="P21">Böylece WR (kazanma oranı) %40 bile olsa, sistem matematiksel olarak kâr üretmeye devam eder.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5"><text:soft-page-break/>Özetle;</text:p>
      <text:p text:style-name="P41"><text:span text:style-name="T3"><text:tab/>Bu akış, </text:span><text:span text:style-name="Strong_20_Emphasis"><text:span text:style-name="T7">"Gereksiz işlemleri bertaraf etmek"</text:span></text:span><text:span text:style-name="T3"> notuna verilen en net yanıttır. Artık sistemin bir "trade makinesi" değil, bir </text:span><text:span text:style-name="Strong_20_Emphasis"><text:span text:style-name="T7">"karar verme motoru"</text:span></text:span><text:span text:style-name="T3"> haline geliyor. İşlem yapmamak da bir karardır ve çoğu zaman en kârlı karardır.</text:span></text:p>
      <text:p text:style-name="P103"><text:span text:style-name="T1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oft-page-break/><text:span text:style-name="T4"><text:tab/>Bu detaylandırdığın </text:span><text:span text:style-name="Strong_20_Emphasis"><text:span text:style-name="T8">Katmanlı Fonksiyonel Yapı</text:span></text:span><text:span text:style-name="T4">, bir trading botunu "yazılımdan" çıkarıp bir </text:span><text:span text:style-name="Strong_20_Emphasis"><text:span text:style-name="T8">"Yapay Zeka Fonu"</text:span></text:span><text:span text:style-name="T4"> mimarisine dönüştürüyor. Raporundaki o 156 işlemlik kaosu bu katmanlara dağıttığımızda, nerenin neden patladığı ve nasıl tamir edileceği gün gibi ortaya çıkıyor.</text:span></text:p>
      <text:p text:style-name="P12"><text:span text:style-name="T3"><text:tab/>Özellikle vurguladığın kritik noktalar üzerinden sistemi "en iyi sonuç" seviyesine çıkaracak </text:span><text:span text:style-name="Strong_20_Emphasis"><text:span text:style-name="T7">üst düzey dokunuşlarımı</text:span></text:span><text:span text:style-name="T3"> ekliyorum:</text:span></text:p>
      <text:p text:style-name="P6"/>
      <text:p text:style-name="P8">1. Execution Engine: "Sistemin Kalbi" (🧨)</text:p>
      <text:p text:style-name="P12"><text:span text:style-name="T3">Raporundaki </text:span><text:span text:style-name="Strong_20_Emphasis"><text:span text:style-name="T7">%10'luk maliyet (komisyon + kayma)</text:span></text:span><text:span text:style-name="T3"> buranın eseridir.</text:span></text:p>
      <text:list xml:id="list951551648" text:style-name="L32">
        <text:list-item>
          <text:p text:style-name="P56"><text:span text:style-name="Strong_20_Emphasis"><text:span text:style-name="T7">İyileştirme:</text:span></text:span></text:p>
          <text:list>
            <text:list-header>
              <text:p text:style-name="P56"><text:span text:style-name="T3">Buraya bir </text:span><text:span text:style-name="Strong_20_Emphasis"><text:span text:style-name="T7">"Fill Probability" (Dolma Olasılığı)</text:span></text:span><text:span text:style-name="T3"> motoru ekleyelim. Limit emri verdiğinde tahtadaki derinliğe bakar; eğer senin emrinin dolma ihtimali düşükse (önünde çok büyük duvarlar varsa), sistem emri anında revize eder veya iptal eder.</text:span></text:p>
              <text:p text:style-name="P56"><text:span text:style-name="T3"/></text:p>
            </text:list-header>
          </text:list>
        </text:list-item>
        <text:list-item>
          <text:p text:style-name="P56"><text:span text:style-name="Strong_20_Emphasis"><text:span text:style-name="T7">Limit-Only Guard:</text:span></text:span></text:p>
          <text:list>
            <text:list-header>
              <text:p text:style-name="P56"><text:span text:style-name="T3">Kesinlikle "Maker Only" (Post-only) bayrağı zorunlu olmalı. Taker emre sadece "Acil Stop" (Panic Exit) durumunda izin verilmeli.</text:span></text:p>
              <text:p text:style-name="P56"><text:span text:style-name="T3"/></text:p>
            </text:list-header>
          </text:list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2. AI Filter: "İnfazcı" (🔴)</text:p>
      <text:p text:style-name="P41"><text:span text:style-name="T3"><text:tab/>Senin sistemindeki en büyük sorun olan </text:span><text:span text:style-name="Strong_20_Emphasis"><text:span text:style-name="T7">"HIGHUSDT ve RAVEUSDT gibi sistem katilleri"</text:span></text:span><text:span text:style-name="T3"> burada elenir.</text:span></text:p>
      <text:list xml:id="list88201213" text:style-name="L33">
        <text:list-item>
          <text:p text:style-name="P57"><text:span text:style-name="Strong_20_Emphasis"><text:span text:style-name="T7">P(win) Eşiği:</text:span></text:span></text:p>
          <text:list>
            <text:list-header>
              <text:p text:style-name="P57"><text:span text:style-name="T3">AI sadece "sinyal var mı?" diye bakmaz; "Bu saatte, bu spread oranında bu coin daha önce ne yapmış?" diye bakar.</text:span></text:p>
              <text:p text:style-name="P57"><text:span text:style-name="T3"/></text:p>
            </text:list-header>
          </text:list>
        </text:list-item>
        <text:list-item>
          <text:p text:style-name="P94"><text:span text:style-name="Strong_20_Emphasis"><text:span text:style-name="T7">Gelişmiş Veri:</text:span></text:span></text:p>
          <text:list>
            <text:list-header>
              <text:p text:style-name="P94"><text:span text:style-name="T3">Giriş parametrelerine </text:span><text:span text:style-name="Strong_20_Emphasis"><text:span text:style-name="T7">"Funding Rate"</text:span></text:span><text:span text:style-name="T3"> ve </text:span><text:span text:style-name="Strong_20_Emphasis"><text:span text:style-name="T7">"Open Interest"</text:span></text:span><text:span text:style-name="T3"> verilerini de eklemelisin. Balinalar ters yöne pozisyon biriktirirken AI bunu sezer ve </text:span><text:span text:style-name="Source_20_Text"><text:span text:style-name="T11">P(win)</text:span></text:span><text:span text:style-name="T3"> skorunu %40'ın altına çekerek trade'i öldürür.</text:span></text:p>
              <text:p text:style-name="P94"><text:span text:style-name="T3"/></text:p>
            </text:list-header>
          </text:list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text:soft-page-break/>3. Market Regime Engine: "Hayatta Kalma Katmanı" (🟢)</text:p>
      <text:p text:style-name="P16"><text:tab/>Raporunda 15 dakikada 6 kez strateji değişmesi, sistemin piyasayı "okuyamadığını" gösteriyordu.</text:p>
      <text:list xml:id="list1909207593" text:style-name="L34">
        <text:list-item>
          <text:p text:style-name="P58"><text:span text:style-name="Strong_20_Emphasis"><text:span text:style-name="T7">Volatile (No Trade):</text:span></text:span></text:p>
          <text:list>
            <text:list-header>
              <text:p text:style-name="P58"><text:span text:style-name="T3">Bu mod devredeyken sistem "kış uykusuna" yatar. RAVEUSDT'deki o tek trade'de gelen %36'lık terste kalma durumu, piyasanın "Volatile" modunda olduğu ama botun bunu "Trend" sandığı için yaşandı. Bu katman bunu engeller.</text:span></text:p>
            </text:list-header>
          </text:list>
        </text:list-item>
      </text:list>
      <text:p text:style-name="P107"><text:span text:style-name="T3"/></text:p>
      <text:p text:style-name="P107"><text:span text:style-name="T3"/></text:p>
      <text:p text:style-name="P107"><text:span text:style-name="T3"/></text:p>
      <text:p text:style-name="P107"><text:span text:style-name="T3"/></text:p>
      <text:p text:style-name="P107"><text:span text:style-name="T3"/></text:p>
      <text:p text:style-name="P107"><text:span text:style-name="T3"/></text:p>
      <text:p text:style-name="P107"><text:span text:style-name="T3"/></text:p>
      <text:p text:style-name="P107"><text:span text:style-name="T3"/></text:p>
      <text:p text:style-name="P107"><text:span text:style-name="T3"/></text:p>
      <text:p text:style-name="P107"><text:span text:style-name="T3"/></text:p>
      <text:p text:style-name="P107"><text:span text:style-name="T3"/></text:p>
      <text:p text:style-name="P107"><text:span text:style-name="T3"/></text:p>
      <text:p text:style-name="P107"><text:span text:style-name="T3"/></text:p>
      <text:p text:style-name="P108"><text:soft-page-break/><text:span text:style-name="T12">4. Position Manager: "Zarar Kes, Kârı Sür" (📊)</text:span></text:p>
      <text:p text:style-name="P41"><text:span text:style-name="T3">Raporunda </text:span><text:span text:style-name="Strong_20_Emphasis"><text:span text:style-name="T7">TSL (Trailing SL)</text:span></text:span><text:span text:style-name="T3"> 156 işlemde sadece 3 kez çalışmış. Bu bir felaket.</text:span></text:p>
      <text:list xml:id="list4254758616" text:style-name="L35">
        <text:list-item>
          <text:p text:style-name="P59"><text:span text:style-name="Strong_20_Emphasis"><text:span text:style-name="T7">TSL Reformu:</text:span></text:span></text:p>
          <text:list>
            <text:list-header>
              <text:p text:style-name="P59"><text:span text:style-name="T3">TSL'yi sabit bir yüzde (0.9%) değil, </text:span><text:span text:style-name="Strong_20_Emphasis"><text:span text:style-name="T7">"ATR-Adaptive"</text:span></text:span><text:span text:style-name="T3"> (oynaklığa göre değişen) hale getirmelisin. Coin sert hareket ediyorsa TSL alanı genişlemeli, piyasa durgunsa daralmalı.</text:span></text:p>
              <text:p text:style-name="P59"><text:span text:style-name="T3"/></text:p>
            </text:list-header>
          </text:list>
        </text:list-item>
        <text:list-item>
          <text:p text:style-name="P59"><text:span text:style-name="Strong_20_Emphasis"><text:span text:style-name="T7">Best Price Reset Sorunu:</text:span></text:span></text:p>
          <text:list>
            <text:list-header>
              <text:p text:style-name="P59"><text:span text:style-name="T3">Bot her restart olduğunda en iyi fiyatı unutmamalı; veritabanından (Redis veya SQLite) kaldığı yeri okumalı ki büyük kârları kaçırmasın.</text:span></text:p>
              <text:p text:style-name="P59"><text:span text:style-name="T3"/></text:p>
            </text:list-header>
          </text:list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text:soft-page-break/>5. Evolution Engine: "Otonom Öğrenme" (🧬)</text:p>
      <text:list xml:id="list3825693420" text:style-name="L36">
        <text:list-item>
          <text:p text:style-name="P60"><text:span text:style-name="Strong_20_Emphasis"><text:span text:style-name="T7">Random Yerine Veri Bazlı:</text:span></text:span></text:p>
          <text:list>
            <text:list-header>
              <text:p text:style-name="P60"><text:span text:style-name="T3">3 kayıp sonrası strateji değiştirmek yerine, her hafta sonunda </text:span><text:span text:style-name="Strong_20_Emphasis"><text:span text:style-name="T7">"Feature Importance"</text:span></text:span><text:span text:style-name="T3"> analizi yapmalı. Yani "Geçen hafta en çok hangi indikatör kâr ettirdi?" sorusunu sorup, bir sonraki haftanın "Strategy Engine" ağırlıklarını otonom güncellemeli.</text:span></text:p>
              <text:p text:style-name="P60"><text:span text:style-name="T3"/></text:p>
            </text:list-header>
          </text:list>
        </text:list-item>
      </text:list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3"><text:soft-page-break/>🚀 <text:span text:style-name="T15">Uygulama Reçetesi (Öncelikli Sıralama)</text:span></text:p>
      <text:list xml:id="list2975173725" text:style-name="L37">
        <text:list-item>
          <text:p text:style-name="P95"><text:span text:style-name="Strong_20_Emphasis"><text:span text:style-name="T7">Hızlı Etki:</text:span></text:span></text:p>
          <text:list>
            <text:list-header>
              <text:p text:style-name="P95"><text:span text:style-name="Strong_20_Emphasis"><text:span text:style-name="T7">Execution Engine</text:span></text:span><text:span text:style-name="T3">'i hemen </text:span><text:span text:style-name="Source_20_Text"><text:span text:style-name="T11">%100 Limit Order</text:span></text:span><text:span text:style-name="T3"> moduna çek ve </text:span><text:span text:style-name="Strong_20_Emphasis"><text:span text:style-name="T7">WS/REST Sapma Filtresini</text:span></text:span><text:span text:style-name="T3"> aktif et. (Kâr marjını anında %3-5 artırır).</text:span></text:p>
              <text:p text:style-name="P95"><text:span text:style-name="T3"/></text:p>
            </text:list-header>
          </text:list>
        </text:list-item>
        <text:list-item>
          <text:p text:style-name="P61"><text:span text:style-name="Strong_20_Emphasis"><text:span text:style-name="T7">Güvenlik:</text:span></text:span></text:p>
          <text:list>
            <text:list-header>
              <text:p text:style-name="P61"><text:span text:style-name="Strong_20_Emphasis"><text:span text:style-name="T7">Risk Engine</text:span></text:span><text:span text:style-name="T3">'e "Max Notional" ve "Symbol Blacklist" (HIGH, RAVE stop) kurallarını enjekte et.</text:span></text:p>
              <text:p text:style-name="P61"><text:span text:style-name="T3"/></text:p>
            </text:list-header>
          </text:list>
        </text:list-item>
        <text:list-item>
          <text:p text:style-name="P61"><text:span text:style-name="Strong_20_Emphasis"><text:span text:style-name="T7">Zeka:</text:span></text:span></text:p>
          <text:list>
            <text:list-header>
              <text:p text:style-name="P61"><text:span text:style-name="Strong_20_Emphasis"><text:span text:style-name="T7">AI Filter</text:span></text:span><text:span text:style-name="T3"> katmanı için veri toplamaya başla (RSI, ATR, Spread, Saat vb. etiketli veriler).</text:span></text:p>
              <text:p text:style-name="P61"><text:span text:style-name="T3"/></text:p>
            </text:list-header>
          </text:list>
        </text:list-item>
        <text:list-item>
          <text:p text:style-name="P61"><text:span text:style-name="Strong_20_Emphasis"><text:span text:style-name="T7">Stabilite:</text:span></text:span></text:p>
          <text:list>
            <text:list-header>
              <text:p text:style-name="P61"><text:span text:style-name="Strong_20_Emphasis"><text:span text:style-name="T7">Market Regime Engine</text:span></text:span><text:span text:style-name="T3">'i kurarak "Kaos anında trade durdur" emrini sisteme öğret.</text:span></text:p>
              <text:p text:style-name="P61"><text:span text:style-name="T3"/></text:p>
            </text:list-header>
          </text:list>
        </text:list-item>
      </text:list>
      <text:p text:style-name="P41"><text:span text:style-name="T3"><text:tab/>Bu mimari ile sistemin artık sadece "sayısal gerçekliği" değil, </text:span><text:span text:style-name="Strong_20_Emphasis"><text:span text:style-name="T7">"piyasa mantığını"</text:span></text:span><text:span text:style-name="T3"> da yönetir hale gelecek.</text:span></text:p>
      <text:p text:style-name="P103"><text:span text:style-name="T1"/></text:p>
      <text:p text:style-name="P103"><text:span text:style-name="T1"/></text:p>
      <text:p text:style-name="P103"><text:span text:style-name="T1"/></text:p>
      <text:p text:style-name="P103"><text:span text:style-name="T1"/></text:p>
      <text:p text:style-name="P103"><text:span text:style-name="T1"/></text:p>
      <text:p text:style-name="P103"><text:span text:style-name="T1"/></text:p>
      <text:p text:style-name="P103"><text:span text:style-name="T1"/></text:p>
      <text:p text:style-name="P103"><text:span text:style-name="T1"/></text:p>
      <text:p text:style-name="P103"><text:span text:style-name="T1"/></text:p>
      <text:p text:style-name="P103"><text:span text:style-name="T1"/></text:p>
      <text:p text:style-name="P12"><text:soft-page-break/><text:span text:style-name="T4"><text:tab/>Bu </text:span><text:span text:style-name="Strong_20_Emphasis"><text:span text:style-name="T8">3 ayrı "Kill Switch" (Acil Durdurma Anahtarı)</text:span></text:span><text:span text:style-name="T4"> yapısı, sistemi bir "algoritma" olmaktan çıkarıp, gerçek bir **"Otonom Risk Ofisi"**ne dönüştürüyor. Raporundaki o 156 işlemlik "başıboş" yapıyı dizginleyecek en gelişmiş savunma hattı tam olarak budur.</text:span></text:p>
      <text:p text:style-name="P12"><text:span text:style-name="T3"><text:tab/>Bu modüller arası veto sistemini </text:span><text:span text:style-name="Strong_20_Emphasis"><text:span text:style-name="T7">en üst düzey hassasiyetle</text:span></text:span><text:span text:style-name="T3"> şu şekilde optimize etmeliyiz:</text:span></text:p>
      <text:p text:style-name="P8">1. Regime Veto: "Piyasa Bozuksa, Dükkan Kapalı"</text:p>
      <text:p text:style-name="P5">Bu en üstteki durdurucudur.</text:p>
      <text:list xml:id="list4131798704" text:style-name="L38">
        <text:list-item>
          <text:p text:style-name="P62"><text:span text:style-name="Strong_20_Emphasis"><text:span text:style-name="T7">Veto Şartı:</text:span></text:span></text:p>
          <text:list>
            <text:list-header>
              <text:p text:style-name="P62"><text:span text:style-name="T3">Eğer piyasa tipi </text:span><text:span text:style-name="Strong_20_Emphasis"><text:span text:style-name="T7">"VOLATILE"</text:span></text:span><text:span text:style-name="T3"> (kaotik/yönsüz yüksek oynaklık) olarak etiketlenmişse, aşağıdaki AI veya Strateji ne derse desin sistem "uyku moduna" geçer.</text:span></text:p>
              <text:p text:style-name="P62"><text:span text:style-name="T3"/></text:p>
            </text:list-header>
          </text:list>
        </text:list-item>
        <text:list-item>
          <text:p text:style-name="P62"><text:span text:style-name="Strong_20_Emphasis"><text:span text:style-name="T7">Hassasiyet:</text:span></text:span></text:p>
          <text:list>
            <text:list-header>
              <text:p text:style-name="P62"><text:span text:style-name="T3">RAVEUSDT'deki o tek trade'de %36 terste kalma durumu burada engellenir. "Piyasa gürültülü, mesafe ölçülemiyor" der ve tüm sinyalleri çöpe atar.</text:span></text:p>
              <text:p text:style-name="P62"><text:span text:style-name="T3"/></text:p>
            </text:list-header>
          </text:list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text:soft-page-break/>2. AI Veto: "Sinyal Var Ama Kalite Yok"</text:p>
      <text:p text:style-name="P16">Strateji (Strategy Engine) "Al" dese bile AI'nın veto hakkı saklıdır.</text:p>
      <text:list xml:id="list890843425" text:style-name="L39">
        <text:list-item>
          <text:p text:style-name="P96"><text:span text:style-name="Strong_20_Emphasis"><text:span text:style-name="T7">Veto Şartı:</text:span></text:span></text:p>
          <text:list>
            <text:list-header>
              <text:p text:style-name="P96"><text:span text:style-name="Source_20_Text"><text:span text:style-name="T11">P(win) &lt; Threshold</text:span></text:span><text:span text:style-name="T3"> (Kazanma olasılığı eşik değerin altında).</text:span></text:p>
              <text:p text:style-name="P96"><text:span text:style-name="T3"/></text:p>
            </text:list-header>
          </text:list>
        </text:list-item>
        <text:list-item>
          <text:p text:style-name="P63"><text:span text:style-name="Strong_20_Emphasis"><text:span text:style-name="T7">Hassasiyet:</text:span></text:span></text:p>
          <text:list>
            <text:list-header>
              <text:p text:style-name="P63"><text:span text:style-name="T3">AI; fonlama oranlarını, balina hareketlerini veya o anki spread genişliğini kontrol eder. "Sinyal doğru ama bu coin'in tahtası şu an çok sığ, içeride kalabilirsin" diyerek işlemi öldürür. Bu, </text:span><text:span text:style-name="Strong_20_Emphasis"><text:span text:style-name="T7">HIGHUSDT</text:span></text:span><text:span text:style-name="T3"> faciasını önleyen ana kalkandır.</text:span></text:p>
            </text:list-header>
          </text:list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text:soft-page-break/>3. Risk Veto: "Matematik İzin Vermiyor"</text:p>
      <text:p text:style-name="P16">Son güvenlik duvarıdır. Sinyal ve AI "Evet" dese bile matematik onaylamalıdır.</text:p>
      <text:list xml:id="list783427830" text:style-name="L40">
        <text:list-item>
          <text:p text:style-name="P97"><text:span text:style-name="Strong_20_Emphasis"><text:span text:style-name="T7">Veto Şartı:</text:span></text:span></text:p>
          <text:list>
            <text:list-header>
              <text:p text:style-name="P97"><text:span text:style-name="Source_20_Text"><text:span text:style-name="T11">Expected_RR &lt; 1.5</text:span></text:span><text:span text:style-name="T3"> veya </text:span><text:span text:style-name="Source_20_Text"><text:span text:style-name="T11">Account_Exposure &gt; %X</text:span></text:span><text:span text:style-name="T3">.</text:span></text:p>
              <text:p text:style-name="P97"><text:span text:style-name="T3"/></text:p>
            </text:list-header>
          </text:list>
        </text:list-item>
        <text:list-item>
          <text:p text:style-name="P64"><text:span text:style-name="Strong_20_Emphasis"><text:span text:style-name="T7">Hassasiyet:</text:span></text:span></text:p>
          <text:list>
            <text:list-header>
              <text:p text:style-name="P64"><text:span text:style-name="T3">Eğer giriş fiyatı ile SL arasındaki mesafe çok açıksa ve kâr hedefi bunu karşılamıyorsa (RR &lt; 1.5), Risk Engine "bu kumar olur" der ve emri </text:span><text:span text:style-name="Strong_20_Emphasis"><text:span text:style-name="T7">Execution</text:span></text:span><text:span text:style-name="T3">'a göndermez.</text:span></text:p>
              <text:p text:style-name="P64"><text:span text:style-name="T3"/></text:p>
            </text:list-header>
          </text:list>
        </text:list-item>
      </text:list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3"><text:soft-page-break/>🛡️ <text:span text:style-name="T15">Neden Bu Yapı "En İyisi"?</text:span></text:p>
      <text:p text:style-name="P41"><text:span text:style-name="T3"><text:tab/>Eski sisteminde </text:span><text:span text:style-name="Strong_20_Emphasis"><text:span text:style-name="T7">tek bir geçit</text:span></text:span><text:span text:style-name="T3"> vardı (Sinyal -&gt; Emir). Şimdi ise </text:span><text:span text:style-name="Strong_20_Emphasis"><text:span text:style-name="T7">üç aşamalı bir vize kontrolü</text:span></text:span><text:span text:style-name="T3"> var:</text:span></text:p>
      <text:list xml:id="list3659907569" text:style-name="L41">
        <text:list-item>
          <text:p text:style-name="P65"><text:span text:style-name="Strong_20_Emphasis"><text:span text:style-name="T7">Regime:</text:span></text:span><text:span text:style-name="T3"> Hava durumuna bakar (Fırtına varsa uçuş yok).</text:span></text:p>
        </text:list-item>
        <text:list-item>
          <text:p text:style-name="P65"><text:span text:style-name="Strong_20_Emphasis"><text:span text:style-name="T7">AI:</text:span></text:span><text:span text:style-name="T3"> Uçağın mekaniğine ve rotaya bakar (Arıza riski varsa kalkış yok).</text:span></text:p>
        </text:list-item>
        <text:list-item>
          <text:p text:style-name="P65"><text:span text:style-name="Strong_20_Emphasis"><text:span text:style-name="T7">Risk:</text:span></text:span><text:span text:style-name="T3"> Yakıt hesabına bakar (Varış noktasına yetmiyorsa kalkış yok).</text:span></text:p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3"><text:soft-page-break/>🛠️ <text:span text:style-name="T15">Teknik Entegrasyon Önerisi</text:span></text:p>
      <text:list xml:id="list1657020130" text:style-name="L42">
        <text:list-item>
          <text:p text:style-name="P98"><text:span text:style-name="Strong_20_Emphasis"><text:span text:style-name="T7">Logic:</text:span></text:span></text:p>
          <text:list>
            <text:list-header>
              <text:p text:style-name="P98"><text:span text:style-name="T3">Bu 3 veto mekanizmasını </text:span><text:span text:style-name="Source_20_Text"><text:span text:style-name="T11">AND</text:span></text:span><text:span text:style-name="T3"> mantığıyla değil, </text:span><text:span text:style-name="Strong_20_Emphasis"><text:span text:style-name="T7">seri bağlı sigortalar</text:span></text:span><text:span text:style-name="T3"> gibi kurgulayalım. Biri atarsa akım (order) kesilir.</text:span></text:p>
              <text:p text:style-name="P98"><text:span text:style-name="T3"/></text:p>
            </text:list-header>
          </text:list>
        </text:list-item>
        <text:list-item>
          <text:p text:style-name="P98"><text:span text:style-name="Strong_20_Emphasis"><text:span text:style-name="T7">Loglama:</text:span></text:span></text:p>
          <text:list>
            <text:list-header>
              <text:p text:style-name="P98"><text:span text:style-name="T3">Her vetonun sebebini (Örn: </text:span><text:span text:style-name="Source_20_Text"><text:span text:style-name="T11">VETO_BY_REGIME: Volatility_Exceeded</text:span></text:span><text:span text:style-name="T3">) Performance Engine'e kaydetmelisin. Böylece hangi korumanın seni ne kadar zarardan kurtardığını otonom olarak görebilirsin.</text:span></text:p>
            </text:list-header>
          </text:list>
        </text:list-item>
      </text:list>
      <text:p text:style-name="P103"><text:span text:style-name="T1"/></text:p>
      <text:p text:style-name="P12"><text:span text:style-name="T4"><text:tab/>Bu 5 eksik parça, aslında sistemin "neden kârı masada bıraktığını" ve "neden gereksiz yere kan kaybettiğini" açıklayan anahtar eksiklerdir. Bu katmanlar eklenmeden sistem sadece bir </text:span><text:span text:style-name="Strong_20_Emphasis"><text:span text:style-name="T8">"emir gönderici"</text:span></text:span><text:span text:style-name="T4"> olarak kalır; eklendiğinde ise bir **"servet yönetimi algoritması"**na dönüşür.</text:span></text:p>
      <text:p text:style-name="P12"><text:span text:style-name="T3"><text:tab/>Not ettiğin bu </text:span><text:span text:style-name="Strong_20_Emphasis"><text:span text:style-name="T7">"Olmazsa Olmaz"</text:span></text:span><text:span text:style-name="T3"> maddeleri, senin sistemindeki mevcut "rakamsal gerçekliği" (PnL, maliyet, zarar nedenselliği) nasıl iyileştirecek, en gelişmiş teknik formüllerle inceleyelim:</text:span></text:p>
      <text:p text:style-name="P6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1. Execution Gate (Maliyet Muhafızı) 🛡️</text:p>
      <text:p text:style-name="P5">Raporundaki %0.7'lik WS/REST sapması bu kapıdan geçemezdi.</text:p>
      <text:list xml:id="list2104739616" text:style-name="L43">
        <text:list-item>
          <text:p text:style-name="P99"><text:span text:style-name="Strong_20_Emphasis"><text:span text:style-name="T7">Fonksiyon:</text:span></text:span></text:p>
          <text:list>
            <text:list-header>
              <text:p text:style-name="P99"><text:span text:style-name="T3">Emir tetiklendiği an; </text:span><text:span text:style-name="Source_20_Text"><text:span text:style-name="T11">current_ask - current_bid</text:span></text:span><text:span text:style-name="T3"> (spread) ve </text:span><text:span text:style-name="Source_20_Text"><text:span text:style-name="T11">ws_price vs rest_price</text:span></text:span><text:span text:style-name="T3"> karşılaştırılır.</text:span></text:p>
              <text:p text:style-name="P99"><text:span text:style-name="T3"/></text:p>
            </text:list-header>
          </text:list>
        </text:list-item>
        <text:list-item>
          <text:p text:style-name="P66"><text:span text:style-name="Strong_20_Emphasis"><text:span text:style-name="T7">Teknik Kural:</text:span></text:span></text:p>
          <text:list>
            <text:list-header>
              <text:p text:style-name="P66"><text:span text:style-name="T3">Sapma &gt; %0.15 ise veya Spread &gt; %0.2 ise emri </text:span><text:span text:style-name="Strong_20_Emphasis"><text:span text:style-name="T7">beklemeye al (WAIT)</text:span></text:span><text:span text:style-name="T3">. "Fiyat normale dönene kadar tetiğe basma."</text:span></text:p>
              <text:p text:style-name="P66"><text:span text:style-name="T3"/></text:p>
            </text:list-header>
          </text:list>
        </text:list-item>
        <text:list-item>
          <text:p text:style-name="P66"><text:span text:style-name="Strong_20_Emphasis"><text:span text:style-name="T7">Sonuç:</text:span></text:span></text:p>
          <text:list>
            <text:list-header>
              <text:p text:style-name="P66"><text:span text:style-name="T3">HIGHUSDT gibi "fiyat kayması" olan sembollerdeki o -50$'lık zararı daha oluşmadan engeller.</text:span></text:p>
              <text:p text:style-name="P66"><text:span text:style-name="T3"/></text:p>
            </text:list-header>
          </text:list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text:soft-page-break/>2. Regime Filter (Piyasa Pusulası) 🧭</text:p>
      <text:p text:style-name="P16">Şu an sistemin "körlemesine" her piyasada aynı scalp/swing stratejisini deniyor.</text:p>
      <text:list xml:id="list2566147513" text:style-name="L44">
        <text:list-item>
          <text:p text:style-name="P67"><text:span text:style-name="Strong_20_Emphasis"><text:span text:style-name="T7">Fonksiyon:</text:span></text:span></text:p>
          <text:list>
            <text:list-header>
              <text:p text:style-name="P67"><text:span text:style-name="T3">Volatiliteyi (ATR ve Standart Sapma) 3 farklı zaman diliminde (5dk, 15dk, 1saat) ölçer.</text:span></text:p>
              <text:p text:style-name="P67"><text:span text:style-name="T3"/></text:p>
            </text:list-header>
          </text:list>
        </text:list-item>
        <text:list-item>
          <text:p text:style-name="P67"><text:span text:style-name="Strong_20_Emphasis"><text:span text:style-name="T7">Teknik Kural:</text:span></text:span></text:p>
          <text:list>
            <text:list-header>
              <text:p text:style-name="P67"><text:span text:style-name="T3">Eğer kısa vadedeki oynaklık, uzun vadenin %300 üzerindeyse; modu </text:span><text:span text:style-name="Strong_20_Emphasis"><text:span text:style-name="T7">"CHAOS/NO_TRADE"</text:span></text:span><text:span text:style-name="T3"> yap.</text:span></text:p>
              <text:p text:style-name="P67"><text:span text:style-name="T3"/></text:p>
            </text:list-header>
          </text:list>
        </text:list-item>
        <text:list-item>
          <text:p text:style-name="P67"><text:span text:style-name="Strong_20_Emphasis"><text:span text:style-name="T7">Sonuç:</text:span></text:span></text:p>
          <text:list>
            <text:list-header>
              <text:p text:style-name="P67"><text:span text:style-name="T3">RAVEUSDT'deki o kontrolsüz %36'lık düşüşte "bu piyasa şu an tahmin edilemez" diyerek sistemi kenara çeker.</text:span></text:p>
              <text:p text:style-name="P67"><text:span text:style-name="T3"/></text:p>
            </text:list-header>
          </text:list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text:soft-page-break/>3. AI Trade Filter (Kalite Müfettişi) 🧠</text:p>
      <text:p text:style-name="P16">En kritik upgrade budur. Her sinyal "kâr potansiyeli" taşımaz.</text:p>
      <text:list xml:id="list162720374" text:style-name="L45">
        <text:list-item>
          <text:p text:style-name="P68"><text:span text:style-name="Strong_20_Emphasis"><text:span text:style-name="T7">Fonksiyon:</text:span></text:span></text:p>
          <text:list>
            <text:list-header>
              <text:p text:style-name="P68"><text:span text:style-name="T3">Sinyal geldiğinde; o sembolün son 24 saatteki WR'si, o anki hacim profili ve BTC ile olan korelasyonuna bakar.</text:span></text:p>
              <text:p text:style-name="P68"><text:span text:style-name="T3"/></text:p>
            </text:list-header>
          </text:list>
        </text:list-item>
        <text:list-item>
          <text:p text:style-name="P68"><text:span text:style-name="Strong_20_Emphasis"><text:span text:style-name="T7">Teknik Kural:</text:span></text:span></text:p>
          <text:list>
            <text:list-header>
              <text:p text:style-name="P68"><text:span text:style-name="T3">Bir </text:span><text:span text:style-name="Strong_20_Emphasis"><text:span text:style-name="T7">"Decision Tree"</text:span></text:span><text:span text:style-name="T3"> veya </text:span><text:span text:style-name="Strong_20_Emphasis"><text:span text:style-name="T7">"Random Forest"</text:span></text:span><text:span text:style-name="T3"> modeli ile her trade için bir </text:span><text:span text:style-name="Strong_20_Emphasis"><text:span text:style-name="T7">Confidence Score</text:span></text:span><text:span text:style-name="T3"> (Güven Skoru) üretir. Skor &lt; 0.65 ise trade veto edilir.</text:span></text:p>
              <text:p text:style-name="P68"><text:span text:style-name="T3"/></text:p>
            </text:list-header>
          </text:list>
        </text:list-item>
        <text:list-item>
          <text:p text:style-name="P68"><text:span text:style-name="Strong_20_Emphasis"><text:span text:style-name="T7">Sonuç:</text:span></text:span></text:p>
          <text:list>
            <text:list-header>
              <text:p text:style-name="P68"><text:span text:style-name="T3">WR'yi %45'ten %60+'lara taşıyacak olan ana filtre budur.</text:span></text:p>
            </text:list-header>
          </text:list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text:soft-page-break/>4. Symbol Ranking (Liyakat Sistemi) 🏆</text:p>
      <text:p text:style-name="P16">Sistemde her coin eşit değildir.</text:p>
      <text:list xml:id="list4277544767" text:style-name="L46">
        <text:list-item>
          <text:p text:style-name="P70"><text:span text:style-name="Strong_20_Emphasis"><text:span text:style-name="T7">Fonksiyon:</text:span></text:span></text:p>
          <text:list>
            <text:list-header>
              <text:p text:style-name="P70"><text:span text:style-name="T3">Mevcut 100+ sembolü her saat başı; </text:span><text:span text:style-name="Emphasis"><text:span text:style-name="T9">Likidite, Hacim, Spread</text:span></text:span><text:span text:style-name="T3"> ve </text:span><text:span text:style-name="Emphasis"><text:span text:style-name="T9">Expectancy</text:span></text:span><text:span text:style-name="T3"> (beklenen kârlılık) üzerinden puanlar.</text:span></text:p>
              <text:p text:style-name="P70"><text:span text:style-name="T3"/></text:p>
            </text:list-header>
          </text:list>
        </text:list-item>
        <text:list-item>
          <text:p text:style-name="P70"><text:span text:style-name="Strong_20_Emphasis"><text:span text:style-name="T7">Teknik Kural:</text:span></text:span></text:p>
          <text:list>
            <text:list-header>
              <text:p text:style-name="P70"><text:span text:style-name="T3">Sadece ilk 5-10 sembole "İşlem Yetkisi" verilir. Geri kalanlar (zayıf hacimli, manipülatif) otomatik </text:span><text:span text:style-name="Strong_20_Emphasis"><text:span text:style-name="T7">Blacklist</text:span></text:span><text:span text:style-name="T3">'e alınır.</text:span></text:p>
              <text:p text:style-name="P70"><text:span text:style-name="T3"/></text:p>
            </text:list-header>
          </text:list>
        </text:list-item>
        <text:list-item>
          <text:p text:style-name="P69"><text:span text:style-name="Strong_20_Emphasis"><text:span text:style-name="T7">Sonuç:</text:span></text:span><text:span text:style-name="T3"> Enerjini ve sermayeni sadece "kazandıran" atlara (BNB, DOGE gibi) yatırmanı sağlar.</text:span></text:p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text:soft-page-break/>5. Cost Awareness (Maliyet Farkındalığı) 💰</text:p>
      <text:p text:style-name="P16"><text:tab/>Raporundaki 57.75$'lık komisyon/slippage yükü, sistemin "fiyat körlüğünden" kaynaklanıyor.</text:p>
      <text:list xml:id="list359777797" text:style-name="L47">
        <text:list-item>
          <text:p text:style-name="P100"><text:span text:style-name="Strong_20_Emphasis"><text:span text:style-name="T7">Fonksiyon:</text:span></text:span></text:p>
          <text:list>
            <text:list-header>
              <text:p text:style-name="P100"><text:span text:style-name="T3">Her trade öncesi; </text:span><text:span text:style-name="Source_20_Text"><text:span text:style-name="T11">(Maker_Fee + Estimated_Slippage) / Target_Profit</text:span></text:span><text:span text:style-name="T3"> oranını hesaplar.</text:span></text:p>
              <text:p text:style-name="P100"><text:span text:style-name="T3"/></text:p>
            </text:list-header>
          </text:list>
        </text:list-item>
        <text:list-item>
          <text:p text:style-name="P71"><text:span text:style-name="Strong_20_Emphasis"><text:span text:style-name="T7">Teknik Kural:</text:span></text:span></text:p>
          <text:list>
            <text:list-header>
              <text:p text:style-name="P71"><text:span text:style-name="T3">Eğer maliyet, beklenen kârın %20'sinden fazlaysa o trade matematiksel olarak çöp kabul edilir.</text:span></text:p>
              <text:p text:style-name="P71"><text:span text:style-name="T3"/></text:p>
            </text:list-header>
          </text:list>
        </text:list-item>
        <text:list-item>
          <text:p text:style-name="P71"><text:span text:style-name="Strong_20_Emphasis"><text:span text:style-name="T7">Sonuç:</text:span></text:span></text:p>
          <text:list>
            <text:list-header>
              <text:p text:style-name="P71"><text:span text:style-name="T3">"Net beklenti" (Expectancy) her zaman pozitif kalır.</text:span></text:p>
            </text:list-header>
          </text:list>
        </text:list-item>
      </text:list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3"><text:soft-page-break/>🎯 <text:span text:style-name="T15">Proaktif Adım: Nereden Başlıyoruz?</text:span></text:p>
      <text:p text:style-name="P41"><text:span text:style-name="T3"><text:tab/>Bu 5 hayati eksikliği sisteme </text:span><text:span text:style-name="Strong_20_Emphasis"><text:span text:style-name="T7">en gelişmiş formüllerle</text:span></text:span><text:span text:style-name="T3"> enjekte etmek için önceliği </text:span><text:span text:style-name="Strong_20_Emphasis"><text:span text:style-name="T7">Execution Gate</text:span></text:span><text:span text:style-name="T3"> ve </text:span><text:span text:style-name="Strong_20_Emphasis"><text:span text:style-name="T7">Cost Awareness</text:span></text:span><text:span text:style-name="T3">'a vermeliyiz. Çünkü bunlar </text:span><text:span text:style-name="Strong_20_Emphasis"><text:span text:style-name="T7">anında nakit akışını (maliyet düşüşünü)</text:span></text:span><text:span text:style-name="T3"> sağlar.</text:span></text:p>
      <text:p text:style-name="P106"><text:span text:style-name="T17"/></text:p>
      <text:p text:style-name="P106"><text:span text:style-name="T4"><text:tab/>Bu evrimleşmiş yapı ile sistemin "kişiliği" tamamen değişiyor. Eskiden </text:span><text:span text:style-name="Strong_20_Emphasis"><text:span text:style-name="T8">"ne bulursa saldıran bir avcı"</text:span></text:span><text:span text:style-name="T4"> olan botun, artık </text:span><text:span text:style-name="Strong_20_Emphasis"><text:span text:style-name="T8">"pusuda bekleyen bir keskin nişancıya"</text:span></text:span><text:span text:style-name="T4"> dönüşüyor.</text:span></text:p>
      <text:p text:style-name="P106"><text:span text:style-name="T4"/></text:p>
      <text:p text:style-name="P12"><text:span text:style-name="T3"><text:tab/>İşlem sayısının düşmesi (156 → 40-70) bir kayıp değil, aslında sistemin </text:span><text:span text:style-name="Strong_20_Emphasis"><text:span text:style-name="T7">IQ seviyesinin arttığının</text:span></text:span><text:span text:style-name="T3"> kanıtıdır. İşte bu yeni sistem davranışının sayısal ve operasyonel sonuçları: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1. Nitelik Nicelikten Üstündür (Daha Az, Daha Öz)</text:p>
      <text:list xml:id="list2903710967" text:style-name="L48">
        <text:list-item>
          <text:p text:style-name="P72"><text:span text:style-name="Strong_20_Emphasis"><text:span text:style-name="T7">Eski:</text:span></text:span></text:p>
          <text:list>
            <text:list-header>
              <text:p text:style-name="P72"><text:span text:style-name="T3">"Sinyal var mı? Var. Dal!" mantığıyla günde 10-20 işlem.</text:span></text:p>
              <text:p text:style-name="P72"><text:span text:style-name="T3"/></text:p>
            </text:list-header>
          </text:list>
        </text:list-item>
        <text:list-item>
          <text:p text:style-name="P72"><text:span text:style-name="Strong_20_Emphasis"><text:span text:style-name="T7">Yeni:</text:span></text:span></text:p>
          <text:list>
            <text:list-header>
              <text:p text:style-name="P72"><text:span text:style-name="T3">3 kademeli veto sisteminden (Regime, AI, Risk) sadece "kusursuz" olanlar geçer. 156 işlemin içindeki o "çöp" (HIGH, RAVE gibi) işlemler elendiği için </text:span><text:span text:style-name="Strong_20_Emphasis"><text:span text:style-name="T7">WR (Win Rate)</text:span></text:span><text:span text:style-name="T3"> doğal olarak %50-60 bandına yerleşir.</text:span></text:p>
              <text:p text:style-name="P72"><text:span text:style-name="T3"/></text:p>
            </text:list-header>
          </text:list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text:soft-page-break/>2. Matematiksel Pozitif Beklenti (Expectancy)</text:p>
      <text:list xml:id="list998996641" text:style-name="L49">
        <text:list-item>
          <text:p text:style-name="P73"><text:span text:style-name="Strong_20_Emphasis"><text:span text:style-name="T7">Eski:</text:span></text:span></text:p>
          <text:list>
            <text:list-header>
              <text:p text:style-name="P73"><text:span text:style-name="T3">%44 WR ve 1.1 RR ile matematiksel olarak "ölüm sarmalındaydı" (Eksi kâr).</text:span></text:p>
              <text:p text:style-name="P73"><text:span text:style-name="T3"/></text:p>
            </text:list-header>
          </text:list>
        </text:list-item>
        <text:list-item>
          <text:p text:style-name="P73"><text:span text:style-name="Strong_20_Emphasis"><text:span text:style-name="T7">Yeni:</text:span></text:span></text:p>
          <text:list>
            <text:list-header>
              <text:p text:style-name="P73"><text:span text:style-name="T3">%50+ WR ve minimum 1.5 - 2.0 RR gate sayesinde, şans faktörü ortadan kalkar. Her 100 işlemde kasanın büyüyeceği </text:span><text:span text:style-name="Strong_20_Emphasis"><text:span text:style-name="T7">istatistiksel olarak garanti</text:span></text:span><text:span text:style-name="T3"> altına alınır.</text:span></text:p>
              <text:p text:style-name="P73"><text:span text:style-name="T3"/></text:p>
            </text:list-header>
          </text:list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text:soft-page-break/>3. Komisyon ve Slippage Zaferi</text:p>
      <text:list xml:id="list3761252987" text:style-name="L50">
        <text:list-item>
          <text:p text:style-name="P74"><text:span text:style-name="Strong_20_Emphasis"><text:span text:style-name="T7">Eski:</text:span></text:span></text:p>
          <text:list>
            <text:list-header>
              <text:p text:style-name="P74"><text:span text:style-name="T3">Her işleme %0.1 - %0.3 maliyet (Taker fee) ödüyordu. 156 işlemde bu devasa bir drag (sürtünme) yaratıyordu.</text:span></text:p>
              <text:p text:style-name="P74"><text:span text:style-name="T3"/></text:p>
            </text:list-header>
          </text:list>
        </text:list-item>
        <text:list-item>
          <text:p text:style-name="P101"><text:span text:style-name="Strong_20_Emphasis"><text:span text:style-name="T7">Yeni:</text:span></text:span></text:p>
          <text:list>
            <text:list-header>
              <text:p text:style-name="P101"><text:span text:style-name="Source_20_Text"><text:span text:style-name="T11">%100 Limit Order</text:span></text:span><text:span text:style-name="T3"> (Execution Engine) sayesinde işlem başına maliyet neredeyse sıfıra iner. Az işlem yapıldığı için de borsa yerine senin kasan dolar.</text:span></text:p>
              <text:p text:style-name="P101"><text:span text:style-name="T3"/></text:p>
            </text:list-header>
          </text:list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text:soft-page-break/>4. Psikolojik ve Operasyonel Stabilite</text:p>
      <text:list xml:id="list2702658152" text:style-name="L51">
        <text:list-item>
          <text:p text:style-name="P75"><text:span text:style-name="Strong_20_Emphasis"><text:span text:style-name="T7">Eski:</text:span></text:span></text:p>
          <text:list>
            <text:list-header>
              <text:p text:style-name="P75"><text:span text:style-name="T3">Mini-evrim kaosuyla 15 dakikada bir strateji değiştirip panik yapıyordu.</text:span></text:p>
              <text:p text:style-name="P75"><text:span text:style-name="T3"/></text:p>
            </text:list-header>
          </text:list>
        </text:list-item>
        <text:list-item>
          <text:p text:style-name="P75"><text:span text:style-name="Strong_20_Emphasis"><text:span text:style-name="T7">Yeni:</text:span></text:span></text:p>
          <text:list>
            <text:list-header>
              <text:p text:style-name="P75"><text:span text:style-name="Strong_20_Emphasis"><text:span text:style-name="T7">Market Regime Engine</text:span></text:span><text:span text:style-name="T3"> sayesinde piyasa kötüyse "bugün tatil" diyebilen vakur bir duruş sergiler.</text:span></text:p>
            </text:list-header>
          </text:list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text:soft-page-break/>5. Otonom Öğrenme Döngüsü</text:p>
      <text:list xml:id="list3373815414" text:style-name="L52">
        <text:list-item>
          <text:p text:style-name="P76"><text:span text:style-name="Strong_20_Emphasis"><text:span text:style-name="T7">Eski:</text:span></text:span></text:p>
          <text:list>
            <text:list-header>
              <text:p text:style-name="P76"><text:span text:style-name="T3">Hatalarından ders çıkarmıyor, sadece rastgele parametre değiştiriyordu.</text:span></text:p>
              <text:p text:style-name="P76"><text:span text:style-name="T3"/></text:p>
            </text:list-header>
          </text:list>
        </text:list-item>
        <text:list-item>
          <text:p text:style-name="P76"><text:span text:style-name="Strong_20_Emphasis"><text:span text:style-name="T7">Yeni:</text:span></text:span></text:p>
          <text:list>
            <text:list-header>
              <text:p text:style-name="P76"><text:span text:style-name="Strong_20_Emphasis"><text:span text:style-name="T7">Evolution Engine</text:span></text:span><text:span text:style-name="T3"> sayesinde her hafta "Neden kaybettik?" değil, "Hangi AI parametresi daha iyi çalıştı?" sorusuna yanıt arayarak kendini günceller.</text:span></text:p>
            </text:list-header>
          </text:list>
        </text:list-item>
      </text:list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3"><text:soft-page-break/>🛠️ <text:span text:style-name="T15">Kritik Soru ve Uygulama Adımı</text:span></text:p>
      <text:p text:style-name="P41"><text:span text:style-name="T3"><text:tab/>Bu mimariyi tamamladığımızda, artık senin sistemin </text:span><text:span text:style-name="Strong_20_Emphasis"><text:span text:style-name="T7">"robotik trade"</text:span></text:span><text:span text:style-name="T3"> tanımının en üst ligine çıkmış olacak. Rapordaki o -85.6$'lık (BNB/DOGE hariç) net zararı, </text:span><text:span text:style-name="Strong_20_Emphasis"><text:span text:style-name="T7">pozitif ve sürdürülebilir bir kâr grafiğine</text:span></text:span><text:span text:style-name="T3"> dönüştürmek için tüm taşlar yerine oturdu.</text:span></text:p>
      <text:p text:style-name="P105"><text:span text:style-name="T1"/></text:p>
      <text:p text:style-name="P12"><text:span text:style-name="T5"><text:tab/>B</text:span><text:span text:style-name="T4">u tasarım prensipleri, sistemini sadece otomatik bir bot olmaktan çıkarıp profesyonel bir </text:span><text:span text:style-name="Strong_20_Emphasis"><text:span text:style-name="T8">"Quant System" (Kantitatif Sistem)</text:span></text:span><text:span text:style-name="T4"> seviyesine taşıyan temel taşlardır. Belirlediğin her madde, raporundaki kronik kayıpları kâra dönüştürecek derin bir mühendislik mantığı barındırıyor:</text:span></text:p>
      <text:p text:style-name="P8">1. Trade Açmamak = Başarı 🛡️</text:p>
      <text:list xml:id="list1802472772" text:style-name="L53">
        <text:list-item>
          <text:p text:style-name="P77"><text:span text:style-name="Strong_20_Emphasis"><text:span text:style-name="T7">Felsefe:</text:span></text:span></text:p>
          <text:list>
            <text:list-header>
              <text:p text:style-name="P77"><text:span text:style-name="T3">Sermaye koruma, kâr etmekten daha önceliklidir.</text:span></text:p>
              <text:p text:style-name="P77"><text:span text:style-name="T3"/></text:p>
            </text:list-header>
          </text:list>
        </text:list-item>
        <text:list-item>
          <text:p text:style-name="P77"><text:span text:style-name="Strong_20_Emphasis"><text:span text:style-name="T7">Etki:</text:span></text:span></text:p>
          <text:list>
            <text:list-header>
              <text:p text:style-name="P77"><text:span text:style-name="T3">Sistem her sinyale atlamak yerine, "kaybetme ihtimali olanı eleyerek" kasanı korur. Bu, disiplinsiz işlemlerin (RAVEUSDT gibi) önüne geçer. </text:span></text:p>
            </text:list-header>
          </text:list>
          <text:p text:style-name="P28"><text:span text:style-name="T16"/></text:p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text:soft-page-break/>2. Execution &gt; Strategy 🧨</text:p>
      <text:list xml:id="list2766401741" text:style-name="L54">
        <text:list-item>
          <text:p text:style-name="P78"><text:span text:style-name="Strong_20_Emphasis"><text:span text:style-name="T7">Felsefe:</text:span></text:span></text:p>
          <text:list>
            <text:list-header>
              <text:p text:style-name="P78"><text:span text:style-name="T3">En iyi strateji bile kötü bir emir iletimi (slippage/taker fee) ile zarar eder.</text:span></text:p>
              <text:p text:style-name="P78"><text:span text:style-name="T3"/></text:p>
            </text:list-header>
          </text:list>
        </text:list-item>
        <text:list-item>
          <text:p text:style-name="P78"><text:span text:style-name="Strong_20_Emphasis"><text:span text:style-name="T7">Etki:</text:span></text:span></text:p>
          <text:list>
            <text:list-header>
              <text:p text:style-name="P78"><text:span text:style-name="T3">Raporundaki %10'luk maliyet yükünü sıfırlayacak olan budur. </text:span><text:span text:style-name="Strong_20_Emphasis"><text:span text:style-name="T7">Limit order</text:span></text:span><text:span text:style-name="T3"> ve </text:span><text:span text:style-name="Strong_20_Emphasis"><text:span text:style-name="T7">maker-only</text:span></text:span><text:span text:style-name="T3"> mantığı, stratejiden bağımsız olarak her işlemde sana %0.1-%0.2 avantaj sağlar. </text:span></text:p>
            </text:list-header>
          </text:list>
          <text:p text:style-name="P29"><text:span text:style-name="T16"/></text:p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text:soft-page-break/>3. Az Ama Kaliteli İşlem 💎</text:p>
      <text:list xml:id="list1511809809" text:style-name="L55">
        <text:list-item>
          <text:p text:style-name="P79"><text:span text:style-name="Strong_20_Emphasis"><text:span text:style-name="T7">Felsefe:</text:span></text:span></text:p>
          <text:list>
            <text:list-header>
              <text:p text:style-name="P79"><text:span text:style-name="T3">156 orta karar işlem yerine, filtrelerden geçmiş 40 kusursuz işlem daha kârlıdır.</text:span></text:p>
              <text:p text:style-name="P79"><text:span text:style-name="T3"/></text:p>
            </text:list-header>
          </text:list>
        </text:list-item>
        <text:list-item>
          <text:p text:style-name="P79"><text:span text:style-name="Strong_20_Emphasis"><text:span text:style-name="T7">Etki:</text:span></text:span></text:p>
          <text:list>
            <text:list-header>
              <text:p text:style-name="P79"><text:span text:style-name="T3">İşlem başına komisyon maliyeti düşer, net beklenti (Expectancy) ve Win Rate (WR) yükselir. Gereksiz gürültüden kaçınarak sadece yüksek olasılıklı fırsatlara odaklanırsın. </text:span></text:p>
            </text:list-header>
          </text:list>
          <text:p text:style-name="P30"><text:span text:style-name="T16"/></text:p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text:soft-page-break/>4. Sistem Veto Mekanizmalı Olmalı 🛑</text:p>
      <text:list xml:id="list3353018288" text:style-name="L56">
        <text:list-item>
          <text:p text:style-name="P80"><text:span text:style-name="Strong_20_Emphasis"><text:span text:style-name="T7">Felsefe:</text:span></text:span></text:p>
          <text:list>
            <text:list-header>
              <text:p text:style-name="P80"><text:span text:style-name="T3">Sinyal bir öneridir, veto ise bir emirdir.</text:span></text:p>
              <text:p text:style-name="P80"><text:span text:style-name="T3"/></text:p>
            </text:list-header>
          </text:list>
        </text:list-item>
        <text:list-item>
          <text:p text:style-name="P80"><text:span text:style-name="Strong_20_Emphasis"><text:span text:style-name="T7">Etki:</text:span></text:span></text:p>
          <text:list>
            <text:list-header>
              <text:p text:style-name="P80"><text:span text:style-name="Strong_20_Emphasis"><text:span text:style-name="T7">Regime, AI ve Risk</text:span></text:span><text:span text:style-name="T3"> katmanlarının her biri, işlemi iptal etme (veto) yetkisine sahiptir. Bu çok katmanlı savunma, HIGHUSDT örneğindeki gibi fahiş fiyat kaymalarına veya kaotik piyasalara karşı "sigorta" görevi görür. </text:span></text:p>
            </text:list-header>
          </text:list>
          <text:p text:style-name="P31"><text:span text:style-name="T16"/></text:p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text:soft-page-break/>5. ML Karar Vermez → Filtreler 🧠</text:p>
      <text:list xml:id="list3576402227" text:style-name="L57">
        <text:list-item>
          <text:p text:style-name="P81"><text:span text:style-name="Strong_20_Emphasis"><text:span text:style-name="T7">Felsefe:</text:span></text:span></text:p>
          <text:list>
            <text:list-header>
              <text:p text:style-name="P81"><text:span text:style-name="T3">Yapay zeka ne yöne gideceğini tahmin etmek yerine, "bu işlem riskli mi?" sorusuna yanıt vermelidir.</text:span></text:p>
              <text:p text:style-name="P81"><text:span text:style-name="T3"/></text:p>
            </text:list-header>
          </text:list>
        </text:list-item>
        <text:list-item>
          <text:p text:style-name="P102"><text:span text:style-name="Strong_20_Emphasis"><text:span text:style-name="T7">Etki:</text:span></text:span></text:p>
          <text:list>
            <text:list-header>
              <text:p text:style-name="P102"><text:span text:style-name="T3">ML katmanı stratejinin üzerine bir </text:span><text:span text:style-name="Strong_20_Emphasis"><text:span text:style-name="T7">"Kalite Kontrol"</text:span></text:span><text:span text:style-name="T3"> katmanı olarak eklenir. </text:span><text:span text:style-name="Source_20_Text"><text:span text:style-name="T11">P(win)</text:span></text:span><text:span text:style-name="T3"> skoru düşük olan sinyalleri filtreleyerek sistemin genel isabet oranını artırır. </text:span></text:p>
            </text:list-header>
          </text:list>
          <text:p text:style-name="P32"><text:span text:style-name="T16"/></text:p>
        </text:list-item>
      </text:list>
      <text:p text:style-name="P84"><text:span text:style-name="Strong_20_Emphasis"><text:span text:style-name="T7">Sonuç Olarak:</text:span></text:span></text:p>
      <text:p text:style-name="P84"><text:span text:style-name="Strong_20_Emphasis"><text:span text:style-name="T7"><text:tab/></text:span></text:span><text:span text:style-name="T3">Bu mimariyle sistemin artık bir kumarbaz gibi değil, bir </text:span><text:span text:style-name="Strong_20_Emphasis"><text:span text:style-name="T7">kurumsal fon yöneticisi</text:span></text:span><text:span text:style-name="T3"> gibi davranır. Şans faktörünü (stale positions) minimize eder, matematiksel ve istatistiksel üstünlüğü (edge) maksimize eder.</text:span></text:p>
      <text:p text:style-name="P105"><text:span text:style-name="T1"/></text:p>
      <text:p text:style-name="P105"><text:span text:style-name="T1"/></text:p>
      <text:p text:style-name="P10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pitch="variable"/>
    <style:font-face style:name="Google Sans" svg:font-family="'Google Sans', Arial, sans-serif"/>
    <style:font-face style:name="Laksaman" svg:font-family="Laksa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sans-serif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0T14:00:12.240749903</meta:creation-date>
    <dc:date>2026-04-20T17:25:43.565265108</dc:date>
    <meta:editing-duration>PT3H15M16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48" meta:paragraph-count="370" meta:word-count="3508" meta:character-count="23447" meta:non-whitespace-character-count="20464"/>
  </office:meta>
</office:document-meta>
</file>