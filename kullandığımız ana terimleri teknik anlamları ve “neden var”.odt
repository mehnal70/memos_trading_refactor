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list-style-name="L1"/>
    <style:style style:name="P2" style:family="paragraph" style:parent-style-name="Text_20_body" style:list-style-name="L1"/>
    <style:style style:name="P3" style:family="paragraph" style:list-style-name="L2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officeooo:paragraph-rsid="001c9911"/>
    </style:style>
    <style:style style:name="T1" style:family="text">
      <style:text-properties fo:font-variant="normal" fo:text-transform="none" fo:color="#cccccc" loext:opacity="100%" style:font-name="system-ui" fo:font-size="9.7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Operasyon ve Güvenlik Terimleri</text:span></text:p>
      <text:list xml:id="list2468885154" text:style-name="L1">
        <text:list-item>
          <text:p text:style-name="P2"><text:span text:style-name="Strong_20_Emphasis">Preflight Check</text:span>: İşlem öncesi ortam doğrulamasıdır (API key var mı, secret var mı, testnet koşulları hazır mı).<text:line-break/><text:tab/><text:span text:style-name="Strong_20_Emphasis">Neden?</text:span> Hatalı/eksik konfigürasyonla emir akışına girmeyi engeller; “erken fail” sağlar.</text:p>
          <text:p text:style-name="P2"/>
        </text:list-item>
        <text:list-item>
          <text:p text:style-name="P2"><text:span text:style-name="Strong_20_Emphasis">Smoke Test</text:span>: Sistemin kritik yolunu uçtan uca hızlı test eden minimum senaryodur (ör. place/status/cancel).<text:line-break/><text:tab/><text:span text:style-name="Strong_20_Emphasis">Neden?</text:span> Kod derlenmiş olsa bile entegrasyonun gerçekten çalıştığını pratikte doğrular.</text:p>
          <text:p text:style-name="P2"/>
        </text:list-item>
        <text:list-item>
          <text:p text:style-name="P2"><text:span text:style-name="Strong_20_Emphasis">GO/NO-GO Checklist</text:span>: Canlıya geçiş kararı için zorunlu kontrol setidir.<text:line-break/><text:tab/><text:span text:style-name="Strong_20_Emphasis">Neden?</text:span> Kararı kişisel sezgi yerine ölçülebilir kriterlere bağlar.</text:p>
          <text:p text:style-name="P2"/>
        </text:list-item>
        <text:list-item>
          <text:p text:style-name="P2"><text:span text:style-name="Strong_20_Emphasis">Readiness Check (Full Check)</text:span>: Preflight + smoke + log/health sinyallerini birleştirip “hazır/değil” sonucu üretir.<text:line-break/><text:tab/><text:span text:style-name="Strong_20_Emphasis">Neden?</text:span> Tek tek metriklere bakmak yerine operasyonel karar için birleşik skor üretir.</text:p>
          <text:p text:style-name="P2"/>
        </text:list-item>
        <text:list-item>
          <text:p text:style-name="P2"><text:span text:style-name="Strong_20_Emphasis">Emergency Stop</text:span>: İşlem motorunu anında durduran güvenlik anahtarıdır.<text:line-break/><text:tab/><text:span text:style-name="Strong_20_Emphasis">Neden?</text:span> Piyasa anomalisinde, yanlış konfigürasyonda veya risk patlamasında zarar büyümeden sistemi keser.</text:p>
          <text:p text:style-name="P2"/>
        </text:list-item>
        <text:list-item>
          <text:p text:style-name="P2"><text:span text:style-name="Strong_20_Emphasis">Hard-Stop Enforcement</text:span>: Sadece UI’da değil backend’de de “çalıştırma yasağı” uygular.<text:line-break/><text:tab/><text:span text:style-name="Strong_20_Emphasis">Neden?</text:span> UI atlatılsa bile sistemin güvenlik kuralını ihlal etmesini önler.</text:p>
          <text:p text:style-name="P2"/>
        </text:list-item>
      </text:list>
      <text:p text:style-name="Text_20_body"><text:span text:style-name="Strong_20_Emphasis">Kontrol Mimarisi Terimleri</text:span></text:p>
      <text:list xml:id="list3719709595" text:style-name="L2">
        <text:list-item>
          <text:p text:style-name="P4"><text:span text:style-name="Strong_20_Emphasis">Action Policy</text:span>: Buton/aksiyonların ne zaman bloklanacağını merkezi kuralla belirleyen katman.<text:line-break/><text:tab/><text:span text:style-name="Strong_20_Emphasis">Neden?</text:span> Dağınık if-else yerine tek kaynaklı kural yönetimi; bakım ve doğruluk artar.</text:p>
          <text:p text:style-name="P4"/>
        </text:list-item>
        <text:list-item>
          <text:p text:style-name="P4"><text:span text:style-name="Strong_20_Emphasis">Gating (Kapılama)</text:span>: Bir aksiyonun, önkoşullar sağlanmadan tetiklenmemesi.<text:line-break/><text:tab/><text:span text:style-name="Strong_20_Emphasis">Neden?</text:span> “Önce doğrula, sonra çalıştır” sırası garanti edilir.</text:p>
          <text:p text:style-name="P4"/>
        </text:list-item>
        <text:list-item>
          <text:p text:style-name="P4"><text:span text:style-name="Strong_20_Emphasis">Block Reason</text:span>: Bir aksiyonun neden kapalı olduğunu metin olarak üretir.<text:line-break/><text:tab/><text:span text:style-name="Strong_20_Emphasis">Neden?</text:span> Operatör “neden tıklayamıyorum?” sorusuna anında cevap alır; MTTR düşer.</text:p>
          <text:p text:style-name="P4"/>
        </text:list-item>
        <text:list-item>
          <text:p text:style-name="P4"><text:soft-page-break/><text:span text:style-name="Strong_20_Emphasis">Policy Debug Chips</text:span>: Her kritik aksiyon için anlık blok/açık durumunu görsel gösteren debug katmanı.<text:line-break/><text:tab/><text:span text:style-name="Strong_20_Emphasis">Neden?</text:span> Kural motorunun canlı davranışını hızlı gözlemlemeyi sağlar.</text:p>
          <text:p text:style-name="P4"/>
        </text:list-item>
      </text:list>
      <text:p text:style-name="Text_20_body"><text:span text:style-name="Strong_20_Emphasis">Çalışma Modu Terimleri</text:span></text:p>
      <text:list xml:id="list3010554870" text:style-name="L3">
        <text:list-item>
          <text:p text:style-name="P5"><text:span text:style-name="Strong_20_Emphasis">Debug Mode</text:span>: Operasyonel kullanıcıdan gizlenebilecek teknik teşhis bilgilerini açan mod.<text:line-break/><text:tab/><text:span text:style-name="Strong_20_Emphasis">Neden?</text:span> Üretim ekranı sade kalır, teknik ekip gerektiğinde derin teşhisi açar.</text:p>
        </text:list-item>
        <text:list-item>
          <text:p text:style-name="P6"><text:span text:style-name="Strong_20_Emphasis">Persistence (localStorage)</text:span>: Debug tercihini tarayıcı/oturumlar arası saklama.<text:line-break/><text:tab/><text:span text:style-name="Strong_20_Emphasis">Neden?</text:span> Her açılışta tekrar ayar yapma ihtiyacını kaldırır; operatör deneyimi tutarlı olur.</text:p>
          <text:p text:style-name="P6"/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13:57:53.007972230</meta:creation-date>
    <dc:date>2026-02-22T14:04:27.221260358</dc:date>
    <meta:editing-duration>PT6M3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286" meta:character-count="2130" meta:non-whitespace-character-count="1870"/>
  </office:meta>
</office:document-meta>
</file>