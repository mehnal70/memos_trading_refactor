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color="#ce9178" loext:opacity="100%"/>
    </style:style>
    <style:style style:name="T2" style:family="text">
      <style:text-properties fo:color="#ce9178" loext:opacity="100%" fo:font-weight="bold"/>
    </style:style>
    <style:style style:name="T3" style:family="text">
      <style:text-properties fo:color="#569cd6" loext:opacity="100%"/>
    </style:style>
    <style:style style:name="T4" style:family="text">
      <style:text-properties fo:color="#569cd6" loext:opacity="100%" fo:font-weight="bold"/>
    </style:style>
    <style:style style:name="T5" style:family="text">
      <style:text-properties fo:color="#d4d4d4" loext:opacity="100%"/>
    </style:style>
    <style:style style:name="T6" style:family="text">
      <style:text-properties fo:color="#4ec9b0" loext:opacity="100%"/>
    </style:style>
    <style:style style:name="T7" style:family="text">
      <style:text-properties fo:color="#9cdcfe" loext:opacity="100%"/>
    </style:style>
    <style:style style:name="T8" style:family="text">
      <style:text-properties fo:color="#dcdcaa" loext:opacity="100%"/>
    </style:style>
    <style:style style:name="T9" style:family="text">
      <style:text-properties fo:color="#b5cea8" loext:opacity="100%"/>
    </style:style>
    <style:style style:name="T10" style:family="text">
      <style:text-properties fo:color="#6a9955" loext:opacity="100%"/>
    </style:style>
    <style:style style:name="T11" style:family="text">
      <style:text-properties fo:color="#c586c0" loext:opacity="100%"/>
    </style:style>
    <style:style style:name="T12" style:family="text">
      <style:text-properties fo:color="#4fc1ff" loext:opacity="100%"/>
    </style:style>
    <style:style style:name="T13" style:family="text">
      <style:text-properties fo:color="#6796e6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Configuration Helpers - Kullanım Kılavuzu</text:p>
      <text:p text:style-name="Standard"/>
      <text:p text:style-name="Standard">## Genel Bakış</text:p>
      <text:p text:style-name="Standard"/>
      <text:p text:style-name="Standard">`config_helpers` modülü, dinamik pozisyon yönetimi ve güvenlik ayarları için önceden tanımlanmış **preset profilleri** sunar. Manuel konfigürasyon yerine, yatırım stratejinize uygun bir profil seçerek hızlıca başlayabilirsiniz.</text:p>
      <text:p text:style-name="Standard"/>
      <text:p text:style-name="Standard">---</text:p>
      <text:p text:style-name="Standard"/>
      <text:p text:style-name="Standard">## Pozisyon Yönetimi Profilleri</text:p>
      <text:p text:style-name="Standard"/>
      <text:p text:style-name="Standard">### 1. PositionManagementProfile</text:p>
      <text:p text:style-name="Standard"/>
      <text:p text:style-name="Standard">**5 Hazır Profil:**</text:p>
      <text:p text:style-name="Standard"/>
      <text:p text:style-name="Standard">| Profil | Trailing Stop | Scale-In | Scale-Out | Kullanım Alanı |</text:p>
      <text:p text:style-name="Standard">|--------|---------------|----------|-----------|----------------|</text:p>
      <text:p text:style-name="Standard">| `Conservative` | %1.5 | Kapalı | 2 hedef | Düşük risk, istikrar |</text:p>
      <text:p text:style-name="Standard">| `Balanced` | %2.5 | 2 kez | 3 hedef | Orta risk-getiri dengesi |</text:p>
      <text:p text:style-name="Standard">| `Aggressive` | %4.0 | 4 kez | 4 hedef | Yüksek risk, yüksek getiri |</text:p>
      <text:p text:style-name="Standard">| `Scalper` | %0.5 | Kapalı | 2 hedef | Kısa süreli, dar marj |</text:p>
      <text:p text:style-name="Standard">| `SwingTrading` | %5.0 | 3 kez | 4 hedef | Uzun dönem, geniş marj |</text:p>
      <text:p text:style-name="Standard"/>
      <text:p text:style-name="Standard">**Hızlı Başlangıç:**</text:p>
      <text:p text:style-name="Standard"/>
      <text:p text:style-name="Standard">```rust</text:p>
      <text:p text:style-name="Standard">use memos_trading_core::{</text:p>
      <text:p text:style-name="Standard">PositionManagementProfile, DynamicPosition,</text:p>
      <text:p text:style-name="Standard">TrailingStopConfig, ScaleInConfig, ScaleOutConfig,</text:p>
      <text:p text:style-name="Standard">};</text:p>
      <text:p text:style-name="Standard"/>
      <text:p text:style-name="Standard">// Profil seç</text:p>
      <text:p text:style-name="Standard">let profile = PositionManagementProfile::Balanced;</text:p>
      <text:p text:style-name="Standard"/>
      <text:p text:style-name="Standard">// Config'leri al</text:p>
      <text:p text:style-name="Standard">let trailing = profile.trailing_stop_config();</text:p>
      <text:p text:style-name="Standard">let scale_in = profile.scale_in_config();</text:p>
      <text:p text:style-name="Standard">let scale_out = profile.scale_out_config();</text:p>
      <text:p text:style-name="Standard"/>
      <text:p text:style-name="Standard">// Dinamik pozisyon oluştur</text:p>
      <text:p text:style-name="Standard">let mut position = DynamicPosition::new(</text:p>
      <text:p text:style-name="Standard">"BTCUSDT".to_string(),</text:p>
      <text:p text:style-name="Standard">1.0, // Miktar</text:p>
      <text:p text:style-name="Standard">45000.0, // Giriş fiyatı</text:p>
      <text:p text:style-name="Standard">Some(44000.0), // Stop Loss</text:p>
      <text:p text:style-name="Standard">Some(50000.0), // Take Profit</text:p>
      <text:p text:style-name="Standard">trailing,</text:p>
      <text:p text:style-name="Standard">scale_in,</text:p>
      <text:p text:style-name="Standard">scale_out,</text:p>
      <text:p text:style-name="Standard">);</text:p>
      <text:p text:style-name="Standard"/>
      <text:p text:style-name="Standard"><text:soft-page-break/>// Fiyat güncelle (trailing stop otomatik çalışır)</text:p>
      <text:p text:style-name="Standard">position.update_trailing_stop(46000.0);</text:p>
      <text:p text:style-name="Standard">```</text:p>
      <text:p text:style-name="Standard"/>
      <text:p text:style-name="Standard">---</text:p>
      <text:p text:style-name="Standard"/>
      <text:p text:style-name="Standard">## Güvenlik Profilleri</text:p>
      <text:p text:style-name="Standard"/>
      <text:p text:style-name="Standard">### 2. SecurityProfile</text:p>
      <text:p text:style-name="Standard"/>
      <text:p text:style-name="Standard">**4 Ortam Profili:**</text:p>
      <text:p text:style-name="Standard"/>
      <text:p text:style-name="Standard">| Profil | Trade Limit (per min) | API Limit (per sec) | Audit Export | Emergency Stop Yetkisi |</text:p>
      <text:p text:style-name="Standard">|--------|----------------------|---------------------|--------------|----------------------|</text:p>
      <text:p text:style-name="Standard">| `Development` | Sınırsız | 100 | Kapalı | Admin/Trader/Monitor |</text:p>
      <text:p text:style-name="Standard">| `Staging` | 60 | 20 | Her saat | Admin/Trader |</text:p>
      <text:p text:style-name="Standard">| `Production` | 10 | 10 | Her 30dk | Sadece Admin |</text:p>
      <text:p text:style-name="Standard">| `Enterprise` | 5 | 5 | Her 15dk | Sadece Admin |</text:p>
      <text:p text:style-name="Standard"/>
      <text:p text:style-name="Standard">**Hızlı Başlangıç:**</text:p>
      <text:p text:style-name="Standard"/>
      <text:p text:style-name="Standard">```rust</text:p>
      <text:p text:style-name="Standard">use memos_trading_core::{SecurityProfile, SecurityManager, UserRole, User};</text:p>
      <text:p text:style-name="Standard"/>
      <text:p text:style-name="Standard">// Profil seç (production ortam için)</text:p>
      <text:p text:style-name="Standard">let profile = SecurityProfile::Production;</text:p>
      <text:p text:style-name="Standard"/>
      <text:p text:style-name="Standard">// SecurityManager oluştur</text:p>
      <text:p text:style-name="Standard">let mut security = SecurityManager::new();</text:p>
      <text:p text:style-name="Standard"/>
      <text:p text:style-name="Standard">// Rate limit kuralları ekle</text:p>
      <text:p text:style-name="Standard">security.add_rate_limit_rule(profile.trade_rate_limit())?;</text:p>
      <text:p text:style-name="Standard">security.add_rate_limit_rule(profile.api_rate_limit())?;</text:p>
      <text:p text:style-name="Standard"/>
      <text:p text:style-name="Standard">// Kullanıcı ekle</text:p>
      <text:p text:style-name="Standard">let user = User {</text:p>
      <text:p text:style-name="Standard">id: "trader123".to_string(),</text:p>
      <text:p text:style-name="Standard">name: "John Trader".to_string(),</text:p>
      <text:p text:style-name="Standard">role: UserRole::Trader,</text:p>
      <text:p text:style-name="Standard">};</text:p>
      <text:p text:style-name="Standard">security.add_user(user)?;</text:p>
      <text:p text:style-name="Standard"/>
      <text:p text:style-name="Standard">// İşlem yetki kontrolü</text:p>
      <text:p text:style-name="Standard">if security.authorize_action("trader123", "place_trade")? {</text:p>
      <text:p text:style-name="Standard">println!("Trade onaylandı");</text:p>
      <text:p text:style-name="Standard">}</text:p>
      <text:p text:style-name="Standard">```</text:p>
      <text:p text:style-name="Standard"/>
      <text:p text:style-name="Standard">---</text:p>
      <text:p text:style-name="Standard"/>
      <text:p text:style-name="Standard">## Builder Pattern ile Özelleştirme</text:p>
      <text:p text:style-name="Standard"/>
      <text:p text:style-name="Standard"><text:soft-page-break/>### 3. PositionConfigBuilder</text:p>
      <text:p text:style-name="Standard"/>
      <text:p text:style-name="Standard">**Preset'leri özelleştirmek için:**</text:p>
      <text:p text:style-name="Standard"/>
      <text:p text:style-name="Standard">```rust</text:p>
      <text:p text:style-name="Standard">use memos_trading_core::{</text:p>
      <text:p text:style-name="Standard">PositionConfigBuilder, PositionManagementProfile,</text:p>
      <text:p text:style-name="Standard">TrailingStopConfig, ScaleInConfig,</text:p>
      <text:p text:style-name="Standard">};</text:p>
      <text:p text:style-name="Standard"/>
      <text:p text:style-name="Standard">// Balanced profili al, trailing stop'u özelleştir</text:p>
      <text:p text:style-name="Standard">let (trailing, scale_in, scale_out) = PositionConfigBuilder::new(</text:p>
      <text:p text:style-name="Standard">PositionManagementProfile::Balanced</text:p>
      <text:p text:style-name="Standard">)</text:p>
      <text:p text:style-name="Standard">.with_trailing_stop(TrailingStopConfig {</text:p>
      <text:p text:style-name="Standard">trailing_pct: 3.0, // Custom: %3 trailing</text:p>
      <text:p text:style-name="Standard">min_movement_bps: 75,</text:p>
      <text:p text:style-name="Standard">enabled: true,</text:p>
      <text:p text:style-name="Standard">})</text:p>
      <text:p text:style-name="Standard">.with_scale_in(ScaleInConfig {</text:p>
      <text:p text:style-name="Standard">enabled: true,</text:p>
      <text:p text:style-name="Standard">max_scalein_count: 3, // Custom: 3 kez scale-in</text:p>
      <text:p text:style-name="Standard">scale_in_pct: 40.0,</text:p>
      <text:p text:style-name="Standard">trigger_proximity_pct: 0.7,</text:p>
      <text:p text:style-name="Standard">})</text:p>
      <text:p text:style-name="Standard">.build();</text:p>
      <text:p text:style-name="Standard"/>
      <text:p text:style-name="Standard">// Artık custom config'li pozisyon oluştur</text:p>
      <text:p text:style-name="Standard">let position = DynamicPosition::new(</text:p>
      <text:p text:style-name="Standard">"ETHUSDT".to_string(),</text:p>
      <text:p text:style-name="Standard">2.5,</text:p>
      <text:p text:style-name="Standard">3000.0,</text:p>
      <text:p text:style-name="Standard">Some(2900.0),</text:p>
      <text:p text:style-name="Standard">Some(3500.0),</text:p>
      <text:p text:style-name="Standard">trailing,</text:p>
      <text:p text:style-name="Standard">scale_in,</text:p>
      <text:p text:style-name="Standard">scale_out,</text:p>
      <text:p text:style-name="Standard">);</text:p>
      <text:p text:style-name="Standard">```</text:p>
      <text:p text:style-name="Standard"/>
      <text:p text:style-name="Standard">---</text:p>
      <text:p text:style-name="Standard"/>
      <text:p text:style-name="Standard">## Entegrasyon Örnekleri</text:p>
      <text:p text:style-name="Standard"/>
      <text:p text:style-name="Standard">### Scenario 1: Muhafazakar Day Trading Botu</text:p>
      <text:p text:style-name="Standard"/>
      <text:p text:style-name="Standard">```rust</text:p>
      <text:p text:style-name="Standard">use memos_trading_core::{</text:p>
      <text:p text:style-name="Standard">AdvancedRoboticTrader, SecurityManager, </text:p>
      <text:p text:style-name="Standard">PositionManagementProfile, SecurityProfile,</text:p>
      <text:p text:style-name="Standard">};</text:p>
      <text:p text:style-name="Standard"/>
      <text:p text:style-name="Standard"><text:soft-page-break/>// Conservative profile - düşük risk</text:p>
      <text:p text:style-name="Standard">let profile = PositionManagementProfile::Conservative;</text:p>
      <text:p text:style-name="Standard"/>
      <text:p text:style-name="Standard">// Production security</text:p>
      <text:p text:style-name="Standard">let sec_profile = SecurityProfile::Production;</text:p>
      <text:p text:style-name="Standard">let mut security = SecurityManager::new();</text:p>
      <text:p text:style-name="Standard">security.add_rate_limit_rule(sec_profile.trade_rate_limit())?;</text:p>
      <text:p text:style-name="Standard"/>
      <text:p text:style-name="Standard">// Advanced trader oluştur</text:p>
      <text:p text:style-name="Standard">let mut trader = AdvancedRoboticTrader::new(security, "bot1".to_string());</text:p>
      <text:p text:style-name="Standard"/>
      <text:p text:style-name="Standard">// Trade aç</text:p>
      <text:p text:style-name="Standard">let configs = (</text:p>
      <text:p text:style-name="Standard">profile.trailing_stop_config(),</text:p>
      <text:p text:style-name="Standard">profile.scale_in_config(),</text:p>
      <text:p text:style-name="Standard">profile.scale_out_config(),</text:p>
      <text:p text:style-name="Standard">);</text:p>
      <text:p text:style-name="Standard">trader.open_trade(</text:p>
      <text:p text:style-name="Standard">"BTCUSDT", </text:p>
      <text:p text:style-name="Standard">0.5, </text:p>
      <text:p text:style-name="Standard">45000.0, </text:p>
      <text:p text:style-name="Standard">Some(44000.0), </text:p>
      <text:p text:style-name="Standard">Some(46500.0),</text:p>
      <text:p text:style-name="Standard">Some(configs),</text:p>
      <text:p text:style-name="Standard">)?;</text:p>
      <text:p text:style-name="Standard">```</text:p>
      <text:p text:style-name="Standard"/>
      <text:p text:style-name="Standard">### Scenario 2: Agresif Scalping Botu</text:p>
      <text:p text:style-name="Standard"/>
      <text:p text:style-name="Standard">```rust</text:p>
      <text:p text:style-name="Standard">use memos_trading_core::{PositionManagementProfile, SecurityProfile};</text:p>
      <text:p text:style-name="Standard"/>
      <text:p text:style-name="Standard">// Scalper profil - hızlı giriş/çıkış</text:p>
      <text:p text:style-name="Standard">let profile = PositionManagementProfile::Scalper;</text:p>
      <text:p text:style-name="Standard"/>
      <text:p text:style-name="Standard">// Development ortamı - kimitsiz test</text:p>
      <text:p text:style-name="Standard">let sec_profile = SecurityProfile::Development;</text:p>
      <text:p text:style-name="Standard"/>
      <text:p text:style-name="Standard">// Config'ler</text:p>
      <text:p text:style-name="Standard">let trailing = profile.trailing_stop_config(); // %0.5 dar stop</text:p>
      <text:p text:style-name="Standard">let scale_out = profile.scale_out_config(); // 2 hedeg: %0.5, %1.0</text:p>
      <text:p text:style-name="Standard"/>
      <text:p text:style-name="Standard">println!("Scalper trailing: {:.2}%", trailing.trailing_pct);</text:p>
      <text:p text:style-name="Standard">println!("Profit targets: {:?}", scale_out.profit_targets);</text:p>
      <text:p text:style-name="Standard">```</text:p>
      <text:p text:style-name="Standard"/>
      <text:p text:style-name="Standard">### Scenario 3: Swing Trading Long-Term</text:p>
      <text:p text:style-name="Standard"/>
      <text:p text:style-name="Standard">```rust</text:p>
      <text:p text:style-name="Standard">use memos_trading_core::{PositionManagementProfile, PositionConfigBuilder};</text:p>
      <text:p text:style-name="Standard"/>
      <text:p text:style-name="Standard">// Base: SwingTrading profili</text:p>
      <text:p text:style-name="Standard"><text:soft-page-break/>let mut builder = PositionConfigBuilder::new(</text:p>
      <text:p text:style-name="Standard">PositionManagementProfile::SwingTrading</text:p>
      <text:p text:style-name="Standard">);</text:p>
      <text:p text:style-name="Standard"/>
      <text:p text:style-name="Standard">// Custom: Daha uzun trailing stop</text:p>
      <text:p text:style-name="Standard">let (trailing, _, _) = builder</text:p>
      <text:p text:style-name="Standard">.with_trailing_stop(TrailingStopConfig {</text:p>
      <text:p text:style-name="Standard">trailing_pct: 7.0, // %7 geniş marj</text:p>
      <text:p text:style-name="Standard">min_movement_bps: 300, // 3% hareket şart</text:p>
      <text:p text:style-name="Standard">enabled: true,</text:p>
      <text:p text:style-name="Standard">})</text:p>
      <text:p text:style-name="Standard">.build();</text:p>
      <text:p text:style-name="Standard"/>
      <text:p text:style-name="Standard">println!("Swing trader trailing: {:.2}%", trailing.trailing_pct);</text:p>
      <text:p text:style-name="Standard">```</text:p>
      <text:p text:style-name="Standard"/>
      <text:p text:style-name="Standard">---</text:p>
      <text:p text:style-name="Standard"/>
      <text:p text:style-name="Standard">## Profil Karşılaştırma Tablosu</text:p>
      <text:p text:style-name="Standard"/>
      <text:p text:style-name="Standard">### Trailing Stop Ayarları</text:p>
      <text:p text:style-name="Standard"/>
      <text:p text:style-name="Standard">| Profil | Trailing % | Min Movement (bps) | Kullanım |</text:p>
      <text:p text:style-name="Standard">|--------|------------|--------------------|----------|</text:p>
      <text:p text:style-name="Standard">| Conservative | 1.5% | 25 | Küçük kayıplara tahammülsüz |</text:p>
      <text:p text:style-name="Standard">| Balanced | 2.5% | 50 | Orta dalgalanma toleransı |</text:p>
      <text:p text:style-name="Standard">| Aggressive | 4.0% | 100 | Büyük dalgalanmalar OK |</text:p>
      <text:p text:style-name="Standard">| Scalper | 0.5% | 10 | Çok dar marj, hızlı exit |</text:p>
      <text:p text:style-name="Standard">| SwingTrading | 5.0% | 200 | Uzun dönem trend takibi |</text:p>
      <text:p text:style-name="Standard"/>
      <text:p text:style-name="Standard">### Scale-In Stratejileri</text:p>
      <text:p text:style-name="Standard"/>
      <text:p text:style-name="Standard">| Profil | Enabled | Max Count | Scale-In % | Trigger Proximity % |</text:p>
      <text:p text:style-name="Standard">|--------|---------|-----------|------------|---------------------|</text:p>
      <text:p text:style-name="Standard">| Conservative | ❌ | 1 | 25% | 1.0% |</text:p>
      <text:p text:style-name="Standard">| Balanced | ✅ | 2 | 50% | 0.5% |</text:p>
      <text:p text:style-name="Standard">| Aggressive | ✅ | 4 | 75% | 0.3% |</text:p>
      <text:p text:style-name="Standard">| Scalper | ❌ | 0 | - | - |</text:p>
      <text:p text:style-name="Standard">| SwingTrading | ✅ | 3 | 60% | 2.0% |</text:p>
      <text:p text:style-name="Standard"/>
      <text:p text:style-name="Standard">### Scale-Out Stratejileri</text:p>
      <text:p text:style-name="Standard"/>
      <text:p text:style-name="Standard">| Profil | Max Count | Scale-Out % | Profit Targets |</text:p>
      <text:p text:style-name="Standard">|--------|-----------|-------------|----------------|</text:p>
      <text:p text:style-name="Standard">| Conservative | 2 | 50% | [1%, 2%] |</text:p>
      <text:p text:style-name="Standard">| Balanced | 3 | 33.33% | [2%, 5%, 10%] |</text:p>
      <text:p text:style-name="Standard">| Aggressive | 4 | 25% | [3%, 7%, 15%, 30%] |</text:p>
      <text:p text:style-name="Standard">| Scalper | 2 | 50% | [0.5%, 1%] |</text:p>
      <text:p text:style-name="Standard">| SwingTrading | 4 | 25% | [5%, 10%, 20%, 40%] |</text:p>
      <text:p text:style-name="Standard"/>
      <text:p text:style-name="Standard">---</text:p>
      <text:p text:style-name="Standard"/>
      <text:p text:style-name="Standard"><text:soft-page-break/>## Test Kodu</text:p>
      <text:p text:style-name="Standard"/>
      <text:p text:style-name="Standard">Profilleri test etmek için:</text:p>
      <text:p text:style-name="Standard"/>
      <text:p text:style-name="Standard">```bash</text:p>
      <text:p text:style-name="Standard">cd memos_trading_core</text:p>
      <text:p text:style-name="Standard">cargo test robot::config_helpers --lib</text:p>
      <text:p text:style-name="Standard">```</text:p>
      <text:p text:style-name="Standard"/>
      <text:p text:style-name="Standard">**Expected Output:**</text:p>
      <text:p text:style-name="Standard">```</text:p>
      <text:p text:style-name="Standard">running 4 tests</text:p>
      <text:p text:style-name="Standard">test robot::config_helpers::tests::test_conservative_profile ... ok</text:p>
      <text:p text:style-name="Standard">test robot::config_helpers::tests::test_aggressive_profile ... ok</text:p>
      <text:p text:style-name="Standard">test robot::config_helpers::tests::test_security_profiles ... ok</text:p>
      <text:p text:style-name="Standard">test robot::config_helpers::tests::test_builder_pattern ... ok</text:p>
      <text:p text:style-name="Standard"/>
      <text:p text:style-name="Standard">test result: ok. 4 passed; 0 failed; 0 ignored</text:p>
      <text:p text:style-name="Standard">```</text:p>
      <text:p text:style-name="Standard"/>
      <text:p text:style-name="Standard">---</text:p>
      <text:p text:style-name="Standard"/>
      <text:p text:style-name="Standard">## Advanced Usage</text:p>
      <text:p text:style-name="Standard"/>
      <text:p text:style-name="Standard">### Custom Security Logic</text:p>
      <text:p text:style-name="Standard"/>
      <text:p text:style-name="Standard">```rust</text:p>
      <text:p text:style-name="Standard">use memos_trading_core::{SecurityProfile, SecurityManager, UserRole};</text:p>
      <text:p text:style-name="Standard"/>
      <text:p text:style-name="Standard">// Enterprise profil - çok sıkı kontrol</text:p>
      <text:p text:style-name="Standard">let profile = SecurityProfile::Enterprise;</text:p>
      <text:p text:style-name="Standard">let mut security = SecurityManager::new();</text:p>
      <text:p text:style-name="Standard"/>
      <text:p text:style-name="Standard">// Rate limits</text:p>
      <text:p text:style-name="Standard">security.add_rate_limit_rule(profile.trade_rate_limit())?;</text:p>
      <text:p text:style-name="Standard">security.add_rate_limit_rule(profile.api_rate_limit())?;</text:p>
      <text:p text:style-name="Standard"/>
      <text:p text:style-name="Standard">// Emergency stop yetkisi kontrolü</text:p>
      <text:p text:style-name="Standard">let allowed_roles = profile.emergency_stop_roles();</text:p>
      <text:p text:style-name="Standard">println!("Emergency stop yetkisi: {:?}", allowed_roles);</text:p>
      <text:p text:style-name="Standard"/>
      <text:p text:style-name="Standard">// Audit log export sıklığı</text:p>
      <text:p text:style-name="Standard">let interval = profile.audit_export_interval_minutes();</text:p>
      <text:p text:style-name="Standard">println!("Audit export: her {} dakikada bir", interval);</text:p>
      <text:p text:style-name="Standard">```</text:p>
      <text:p text:style-name="Standard"/>
      <text:p text:style-name="Standard">---</text:p>
      <text:p text:style-name="Standard"/>
      <text:p text:style-name="Standard">## Tauri Desktop Integration</text:p>
      <text:p text:style-name="Standard"/>
      <text:p text:style-name="Standard">**Frontend (React):**</text:p>
      <text:p text:style-name="Standard"/>
      <text:p text:style-name="Standard"><text:soft-page-break/>```typescript</text:p>
      <text:p text:style-name="Standard">import { invoke } from '@tauri-apps/api/core';</text:p>
      <text:p text:style-name="Standard"/>
      <text:p text:style-name="Standard">// Profil seç ve backend'e gönder</text:p>
      <text:p text:style-name="Standard">const profile = 'Balanced'; // Conservative | Balanced | Aggressive | Scalper | SwingTrading</text:p>
      <text:p text:style-name="Standard"/>
      <text:p text:style-name="Standard">const result = await invoke('apply_position_profile', {</text:p>
      <text:p text:style-name="Standard">symbol: 'BTCUSDT',</text:p>
      <text:p text:style-name="Standard">profile: profile,</text:p>
      <text:p text:style-name="Standard">quantity: 1.0,</text:p>
      <text:p text:style-name="Standard">entryPrice: 45000.0,</text:p>
      <text:p text:style-name="Standard">});</text:p>
      <text:p text:style-name="Standard">```</text:p>
      <text:p text:style-name="Standard"/>
      <text:p text:style-name="Standard">**Backend (Tauri Command):**</text:p>
      <text:p text:style-name="Standard"/>
      <text:p text:style-name="Standard">```rust</text:p>
      <text:p text:style-name="Standard">#[tauri::command]</text:p>
      <text:p text:style-name="Standard">async fn apply_position_profile(</text:p>
      <text:p text:style-name="Standard">symbol: String,</text:p>
      <text:p text:style-name="Standard">profile: String,</text:p>
      <text:p text:style-name="Standard">quantity: f64,</text:p>
      <text:p text:style-name="Standard">entry_price: f64,</text:p>
      <text:p text:style-name="Standard">) -&gt; Result&lt;String, String&gt; {</text:p>
      <text:p text:style-name="Standard">use memos_trading_core::{PositionManagementProfile, DynamicPosition};</text:p>
      <text:p text:style-name="Standard">// Parse profil</text:p>
      <text:p text:style-name="Standard">let profile = match profile.as_str() {</text:p>
      <text:p text:style-name="Standard">"Conservative" =&gt; PositionManagementProfile::Conservative,</text:p>
      <text:p text:style-name="Standard">"Balanced" =&gt; PositionManagementProfile::Balanced,</text:p>
      <text:p text:style-name="Standard">"Aggressive" =&gt; PositionManagementProfile::Aggressive,</text:p>
      <text:p text:style-name="Standard">"Scalper" =&gt; PositionManagementProfile::Scalper,</text:p>
      <text:p text:style-name="Standard">"SwingTrading" =&gt; PositionManagementProfile::SwingTrading,</text:p>
      <text:p text:style-name="Standard">_ =&gt; return Err("Invalid profile".to_string()),</text:p>
      <text:p text:style-name="Standard">};</text:p>
      <text:p text:style-name="Standard">// Configs al</text:p>
      <text:p text:style-name="Standard">let trailing = profile.trailing_stop_config();</text:p>
      <text:p text:style-name="Standard">let scale_in = profile.scale_in_config();</text:p>
      <text:p text:style-name="Standard">let scale_out = profile.scale_out_config();</text:p>
      <text:p text:style-name="Standard">// Pozisyon oluştur</text:p>
      <text:p text:style-name="Standard">let position = DynamicPosition::new(</text:p>
      <text:p text:style-name="Standard">symbol,</text:p>
      <text:p text:style-name="Standard">quantity,</text:p>
      <text:p text:style-name="Standard">entry_price,</text:p>
      <text:p text:style-name="Standard">None, None, // SL/TP manuel set edilebilir</text:p>
      <text:p text:style-name="Standard">trailing,</text:p>
      <text:p text:style-name="Standard">scale_in,</text:p>
      <text:p text:style-name="Standard">scale_out,</text:p>
      <text:p text:style-name="Standard">);</text:p>
      <text:p text:style-name="Standard">Ok(format!("Position created with {} profile", profile_name))</text:p>
      <text:p text:style-name="Standard">}</text:p>
      <text:p text:style-name="Standard">```</text:p>
      <text:p text:style-name="Standard"/>
      <text:p text:style-name="Standard"><text:soft-page-break/>---</text:p>
      <text:p text:style-name="Standard"/>
      <text:p text:style-name="Standard">## Best Practices</text:p>
      <text:p text:style-name="Standard"/>
      <text:p text:style-name="Standard">### ✅ DO</text:p>
      <text:p text:style-name="Standard">- **Production'da `Production` veya `Enterprise` security profilini kullan**</text:p>
      <text:p text:style-name="Standard">- **Backtesting için farklı profilleri karşılaştır**</text:p>
      <text:p text:style-name="Standard">- **Custom ihtiyaçlar için `PositionConfigBuilder` kullan**</text:p>
      <text:p text:style-name="Standard">- **Rate limit'leri exchange API limitlerinden DÜŞÜK tut**</text:p>
      <text:p text:style-name="Standard"/>
      <text:p text:style-name="Standard">### ❌ DON'T</text:p>
      <text:p text:style-name="Standard">- **Production'da `Development` profilini KULLANMA**</text:p>
      <text:p text:style-name="Standard">- **Live trading'de `Aggressive` profilini test etmeden BAŞLATMA**</text:p>
      <text:p text:style-name="Standard">- **Trailing stop %'sini çok dar tutma (false exit)**</text:p>
      <text:p text:style-name="Standard">- **Scale-in'i trending olmayan marketlerde kullanma**</text:p>
      <text:p text:style-name="Standard"/>
      <text:p text:style-name="Standard">---</text:p>
      <text:p text:style-name="Standard"/>
      <text:p text:style-name="Standard">## Troubleshooting</text:p>
      <text:p text:style-name="Standard"/>
      <text:p text:style-name="Standard">**Q: Trailing stop çok erken tetikleniyor** </text:p>
      <text:p text:style-name="Standard">A: `min_movement_bps` değerini artır veya daha geniş profil seç (Aggressive/SwingTrading)</text:p>
      <text:p text:style-name="Standard"/>
      <text:p text:style-name="Standard">**Q: Scale-in hiç aktif olmuyor** </text:p>
      <text:p text:style-name="Standard">A: `trigger_proximity_pct` değerini artır veya piyasa volatilitesi yüksek olsa da profil `enabled: false` olabilir</text:p>
      <text:p text:style-name="Standard"/>
      <text:p text:style-name="Standard">**Q: Rate limit hataları alıyorum** </text:p>
      <text:p text:style-name="Standard">A: `SecurityProfile::Development` kullanıyorsan, daha sıkı profile geç (Staging/Production). Exchange API limit'lerini kontrol et.</text:p>
      <text:p text:style-name="Standard"/>
      <text:p text:style-name="Standard">**Q: Emergency stop çalışmıyor** </text:p>
      <text:p text:style-name="Standard">A: `SecurityProfile::emergency_stop_roles()` listesinde user role'ü var mı kontrol et.</text:p>
      <text:p text:style-name="Standard"/>
      <text:p text:style-name="Standard">---</text:p>
      <text:p text:style-name="Standard"/>
      <text:p text:style-name="Standard">## Summary</text:p>
      <text:p text:style-name="Standard"/>
      <text:p text:style-name="Standard">| Özellik | Konumu | Export |</text:p>
      <text:p text:style-name="Standard">|---------|--------|--------|</text:p>
      <text:p text:style-name="Standard">| Pozisyon Profilleri | `robot::config_helpers::PositionManagementProfile` | ✅ lib.rs |</text:p>
      <text:p text:style-name="Standard">| Güvenlik Profilleri | `robot::config_helpers::SecurityProfile` | ✅ lib.rs |</text:p>
      <text:p text:style-name="Standard">| Builder Pattern | `robot::config_helpers::PositionConfigBuilder` | ✅ lib.rs |</text:p>
      <text:p text:style-name="Standard">| Config Types | `robot::portfolio_manager` | ✅ lib.rs |</text:p>
      <text:p text:style-name="Standard">| Security Manager | `robot::security` | ✅ lib.rs |</text:p>
      <text:p text:style-name="Standard"/>
      <text:p text:style-name="Standard">**Son Güncelleme:** Phase 20 - Configuration helpers implementation complete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2T18:23:02.456460859</meta:creation-date>
    <dc:date>2026-02-22T18:23:45.483537885</dc:date>
    <meta:editing-duration>PT44S</meta:editing-duration>
    <meta:editing-cycles>1</meta:editing-cycles>
    <meta:document-statistic meta:table-count="0" meta:image-count="0" meta:object-count="0" meta:page-count="8" meta:paragraph-count="312" meta:word-count="1333" meta:character-count="10382" meta:non-whitespace-character-count="9379"/>
    <meta:generator>LibreOffice/7.3.7.2$Linux_X86_64 LibreOffice_project/30$Build-2</meta:generator>
  </office:meta>
</office:document-meta>
</file>